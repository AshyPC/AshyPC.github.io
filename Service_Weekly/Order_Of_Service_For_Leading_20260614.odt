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>
      <style:paragraph-properties fo:margin-top="0cm" fo:margin-bottom="0.199cm" style:contextual-spacing="false" fo:line-height="115%"/>
    </style:style>
    <style:style style:name="P4" style:family="paragraph" style:parent-style-name="Text_20_body" style:list-style-name="L1">
      <style:paragraph-properties fo:margin-top="0cm" fo:margin-bottom="0.199cm" style:contextual-spacing="false" fo:line-height="115%"/>
    </style:style>
    <style:style style:name="P5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T1" style:family="text">
      <style:text-properties officeooo:rsid="00573cd3"/>
    </style:style>
    <style:style style:name="T2" style:family="text">
      <style:text-properties fo:font-size="14pt" officeooo:rsid="0042820b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1 Corinthians 3:18-23) / <text:span text:style-name="Strong_20_Emphasis">Opening prayer</text:span> (DM)</text:p>
      <text:p text:style-name="P2"><text:span text:style-name="Strong_20_Emphasis">Praise</text:span>: <text:span text:style-name="Emphasis">Ancient of Days</text:span></text:p>
      <text:p text:style-name="P2"><text:span text:style-name="Strong_20_Emphasis">Bible Reading</text:span>: 1 Corinthians 4:1-21 (Seng)</text:p>
      <text:p text:style-name="P3"><text:span text:style-name="Strong_20_Emphasis">Announcements</text:span> (J<text:span text:style-name="T1">ohn </text:span>A)</text:p>
      <text:list text:style-name="L1">
        <text:list-item>
          <text:p text:style-name="P4">Church lunch next week (21st) to farewell Mook, Talia &amp; family.<text:line-break/>See Pam if you have questions.</text:p>
        </text:list-item>
        <text:list-item>
          <text:p text:style-name="P4">Equip26 Women’s Conference is next Saturday.<text:line-break/>Please see Pam or Suzanne if you have questions</text:p>
        </text:list-item>
        <text:list-item>
          <text:p text:style-name="P5">New date for Working Bee - Saturday 11 July</text:p>
        </text:list-item>
      </text:list>
      <text:p text:style-name="P2"><text:span text:style-name="Strong_20_Emphasis">Sunday School</text:span> (Luke &amp; Mia)</text:p>
      <text:p text:style-name="P2"><text:span text:style-name="Strong_20_Emphasis">Praise</text:span>: <text:span text:style-name="Emphasis">This Life I Live</text:span></text:p>
      <text:p text:style-name="P2"><text:span text:style-name="Strong_20_Emphasis">Prayer for the church and the world</text:span>  (J<text:span text:style-name="T1">ohn </text:span>A)</text:p>
      <text:p text:style-name="P2"><text:span text:style-name="Strong_20_Emphasis">Bible reading</text:span>: 1 Thessalonians 2:1-12 (Pam)</text:p>
      <text:p text:style-name="P2"><text:span text:style-name="Strong_20_Emphasis">Praise</text:span>:  <text:span text:style-name="Emphasis">How Sure the Scriptures Are</text:span> (R<text:span text:style-name="T1">ej</text:span>! 279)</text:p>
      <text:p text:style-name="P2"><text:span text:style-name="Strong_20_Emphasis">Sermon</text:span>: “A PASTOR-TEACHER’S JOB DESCRIPTION” (DM)</text:p>
      <text:p text:style-name="P2"><text:span text:style-name="Strong_20_Emphasis">Praise</text:span>: <text:span text:style-name="Emphasis">Revive Your Church, O Lord</text:span> (R<text:span text:style-name="T1">ej</text:span>! 298)</text:p>
      <text:p text:style-name="P2"><text:span text:style-name="Strong_20_Emphasis">Benediction</text:span> (DM)</text:p>
      <text:p text:style-name="P2"><text:span text:style-name="Strong_20_Emphasis">Sermon Outline</text:span></text:p>
      <text:p text:style-name="P2">“A PASTOR-TEACHER’S JOB DESCRIPTION”   (1 Thessalonians 2:1-12)</text:p>
      <text:p text:style-name="P2">Introduction</text:p>
      <text:p text:style-name="P2">1,</text:p>
      <text:p text:style-name="P2">2,</text:p>
      <text:p text:style-name="P2">3.</text:p>
      <text:p text:style-name="P2">Conclusion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87f68"/>
    </style:style>
    <style:style style:name="MT2" style:family="text">
      <style:text-properties officeooo:rsid="00495328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882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4</text:span><text:span text:style-name="MT2">th</text:span> <text:span text:style-name="MT1">June</text:span><text:span text:style-name="MT3"> 202</text:span><text:span text:style-name="MT1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6-13T19:27:42.115138554</dc:date>
    <meta:editing-duration>PT6H51M8S</meta:editing-duration>
    <meta:editing-cycles>50</meta:editing-cycles>
    <meta:generator>LibreOffice/26.2.4.2$Linux_X86_64 LibreOffice_project/620$Build-2</meta:generator>
    <meta:print-date>2024-02-03T21:06:33.278074986</meta:print-date>
    <meta:document-statistic meta:table-count="0" meta:image-count="0" meta:object-count="0" meta:page-count="1" meta:paragraph-count="23" meta:word-count="136" meta:character-count="811" meta:non-whitespace-character-count="697"/>
  </office:meta>
</office:document-meta>
</file>