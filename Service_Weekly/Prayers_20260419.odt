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e2e52"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f2ff6a" officeooo:paragraph-rsid="01f2ff6a" style:font-size-asian="13pt" style:font-style-asian="normal"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5"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f4a2bc" officeooo:paragraph-rsid="01f4a2bc"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c6807f" officeooo:paragraph-rsid="01f4a2bc"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21" style:family="paragraph" style:parent-style-name="Preformatted_20_Text">
      <style:paragraph-properties style:writing-mode="lr-tb"/>
      <style:text-properties fo:font-size="13pt" officeooo:paragraph-rsid="01efb23b" style:font-size-asian="13pt" style:font-size-complex="13pt"/>
    </style:style>
    <style:style style:name="P22"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paragraph-properties style:writing-mode="lr-tb"/>
      <style:text-properties fo:font-size="13pt" officeooo:paragraph-rsid="01dd3a06" style:font-size-asian="13pt" style:font-size-complex="13pt"/>
    </style:style>
    <style:style style:name="P24"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text-properties fo:font-size="13pt" officeooo:paragraph-rsid="01c26751" style:font-size-asian="13pt" style:font-size-complex="13pt"/>
    </style:style>
    <style:style style:name="T1" style:family="text">
      <style:text-properties style:font-name="Liberation Sans" fo:font-size="16pt" fo:font-weight="bold" officeooo:rsid="01f2cc02"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2cc02" style:font-size-asian="16pt" style:font-weight-asian="bold" style:font-size-complex="16pt" style:font-weight-complex="bold"/>
    </style:style>
    <style:style style:name="T7" style:family="text">
      <style:text-properties officeooo:rsid="01f2ff6a"/>
    </style:style>
    <style:style style:name="T8" style:family="text">
      <style:text-properties style:font-name="Liberation Sans" fo:font-style="normal" style:text-underline-style="none" officeooo:rsid="01f2ff6a"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6" style:family="text">
      <style:text-properties officeooo:rsid="01f4a2bc"/>
    </style:style>
    <style:style style:name="T17" style:family="text">
      <style:text-properties fo:font-weight="bold" style:font-weight-asian="bold" style:font-weight-complex="bold"/>
    </style:style>
    <style:style style:name="T18" style:family="text">
      <style:text-properties fo:font-weight="bold" officeooo:rsid="000dd66a" style:font-weight-asian="bold" style:font-weight-complex="bold"/>
    </style:style>
    <style:style style:name="T19" style:family="text">
      <style:text-properties fo:font-weight="bold" officeooo:rsid="0160cefc" style:font-weight-asian="bold" style:font-weight-complex="bold"/>
    </style:style>
    <style:style style:name="T20" style:family="text">
      <style:text-properties officeooo:rsid="01caa47b"/>
    </style:style>
    <style:style style:name="T21" style:family="text">
      <style:text-properties officeooo:rsid="01d74f08"/>
    </style:style>
    <style:style style:name="T22" style:family="text">
      <style:text-properties officeooo:rsid="01db7a8a"/>
    </style:style>
    <style:style style:name="T23" style:family="text">
      <style:text-properties officeooo:rsid="01ef3a07"/>
    </style:style>
    <style:style style:name="T24" style:family="text">
      <style:text-properties officeooo:rsid="01f5c863"/>
    </style:style>
    <style:style style:name="T25"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f5c863"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f6ca01"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3c55a1" fo:background-color="transparent" loext:char-shading-value="0" style:font-style-asian="normal" style:font-style-complex="normal"/>
    </style:style>
    <style:style style:name="T39"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9</text:span><text:span text:style-name="T2">th</text:span><text:span text:style-name="T3"> </text:span><text:span text:style-name="T1">April</text:span><text:span text:style-name="T4"> 20</text:span><text:span text:style-name="T5">2</text:span><text:span text:style-name="T6">6</text:span></text:p>
      <text:p text:style-name="P3">Psalm <text:span text:style-name="T7">28:8</text:span></text:p>
      <text:p text:style-name="P4">[8] The Lord is the strength of his people; he is the saving refuge of his anointed.</text:p>
      <text:p text:style-name="P5"/>
      <text:p text:style-name="P6">Let us pray…</text:p>
      <text:p text:style-name="P6"/>
      <text:p text:style-name="P7">Thanks to God</text:p>
      <text:p text:style-name="P8"><text:span text:style-name="T8">Heavenly Father</text:span><text:span text:style-name="T9">,</text:span><text:span text:style-name="T10"> </text:span><text:span text:style-name="T11">we </text:span><text:span text:style-name="T12">thank You </text:span><text:span text:style-name="T8">for the life of Allan Freer and we thank You that he is now in Your Presence and free of the infirmities of this life</text:span><text:span text:style-name="T13">.</text:span></text:p>
      <text:p text:style-name="P9"/>
      <text:p text:style-name="P10"><text:span text:style-name="T8">We pray that You would strengthen and encorage Jan and that we as a congregation would be able to support her at this time and into the forseeable future</text:span><text:span text:style-name="T13">.</text:span></text:p>
      <text:p text:style-name="P11"/>
      <text:p text:style-name="P10"><text:span text:style-name="T13">We thank You </text:span><text:span text:style-name="T14">that </text:span><text:span text:style-name="T8">Allan knew</text:span><text:span text:style-name="T15"> Your grace and mercy </text:span><text:span text:style-name="T8">and trusted in Jesus </text:span><text:span text:style-name="T15">alone </text:span><text:span text:style-name="T8">for eternal life</text:span><text:span text:style-name="T14">.</text:span></text:p>
      <text:p text:style-name="P12"/>
      <text:p text:style-name="P13">We face afresh the reality that we are imperfect, prone to temptation and that this life is a preparation for our eternal destiny. <text:span text:style-name="T16">We thank You that in Your Presence there is fullness of joy, even as we grieve Allan’s passing. May we take comfort in the assurance of Your Word thay we will one day see him again, for he has joined that great cloud of witnesses spoken of by the writer to the Hebrews.</text:span></text:p>
      <text:p text:style-name="P14"/>
      <text:p text:style-name="P15"><text:span text:style-name="T17">The Wide World...</text:span><text:span text:style-name="T18"> a</text:span><text:span text:style-name="T17">nd the </text:span><text:span text:style-name="T19">W</text:span><text:span text:style-name="T17">ider Church</text:span></text:p>
      <text:p text:style-name="P16">We thank You for Your Church, the Body of Christ, and for the strength of relationships formed in the bonds of peace, by the work of Your Holy Spirit. We thank You that we can reassure each other of the sure hope in the resurrection, since Jesus has gone before us, and continues to intercede for His people from the throne of Grace in the heavenly realm.</text:p>
      <text:p text:style-name="P17"/>
      <text:p text:style-name="P17"><text:span text:style-name="T20">W</text:span><text:span text:style-name="T21">e </text:span><text:span text:style-name="T22">pray</text:span><text:span text:style-name="T21"> for this </text:span><text:span text:style-name="T20">world </text:span><text:span text:style-name="T21">where </text:span><text:span text:style-name="T22">so m</text:span><text:span text:style-name="T23">any live </text:span><text:span text:style-name="T16">without that assurance of eternal hope, and we want to see those we know and many we don’t to come to know the power of the gospel, and the salvation which Jesus won for them by going to the Cross on their behalf.</text:span></text:p>
      <text:p text:style-name="P18"/>
      <text:p text:style-name="P19">We pray for th<text:span text:style-name="T23">os</text:span>e <text:span text:style-name="T24">who despair of being free of their sins, that they would hear the Good News that Jesus has taken the penalty for every sin, has dealt with our guilt and has freed us from the power of the enemy who seeks only to destroy God’s people.</text:span></text:p>
      <text:p text:style-name="P19"/>
      <text:p text:style-name="P20">Ashburton</text:p>
      <text:p text:style-name="P21"><text:span text:style-name="T25">W</text:span><text:span text:style-name="T26">e pray for our</text:span><text:span text:style-name="T27">selves</text:span><text:span text:style-name="T25"> at Ashburton, </text:span><text:span text:style-name="T28">as we </text:span><text:span text:style-name="T29">also </text:span><text:span text:style-name="T27">continue </text:span><text:span text:style-name="T29">the work of the Kingdom. </text:span><text:span text:style-name="T30">We pray for </text:span><text:span text:style-name="T27">the evening prayer service, that we would become increasingly effective in hearing from You, as well as voicing our concerns. We pray for the individual and small group times of prayer, for the spontaneous private prayers of Your people as they respond to Your prompting, so that </text:span><text:span text:style-name="T31">in all things </text:span><text:span text:style-name="T27">we pray according to Your will for Your work among Your people.</text:span></text:p>
      <text:p text:style-name="P22"/>
      <text:p text:style-name="P23"><text:span text:style-name="T32">We thank You for </text:span><text:span text:style-name="T33">Your Word, and for </text:span><text:span text:style-name="T27">Matthew</text:span><text:span text:style-name="T30"> as</text:span><text:span text:style-name="T33"> he preach</text:span><text:span text:style-name="T30">es</text:span><text:span text:style-name="T33"> today. </text:span><text:span text:style-name="T27">Grant him the right words to impart to us what You know we need to hear and apply in our lives</text:span><text:span text:style-name="T30">.</text:span></text:p>
      <text:p text:style-name="P24"/>
      <text:p text:style-name="P25"><text:span text:style-name="T34">In </text:span><text:span text:style-name="T32">His</text:span><text:span text:style-name="T35"> </text:span><text:span text:style-name="T36">Precious Name </text:span><text:span text:style-name="T37">we pray</text:span><text:span text:style-name="T38">, </text:span><text:span text:style-name="T39">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4-18T22:23:24.203431218</dc:date>
    <meta:editing-duration>PT17H56M26S</meta:editing-duration>
    <meta:editing-cycles>204</meta:editing-cycles>
    <meta:generator>LibreOffice/26.2.2.2$Linux_X86_64 LibreOffice_project/620$Build-2</meta:generator>
    <meta:print-date>2025-09-06T23:29:48.038812840</meta:print-date>
    <meta:printed-by>PDF files</meta:printed-by>
    <meta:document-statistic meta:table-count="0" meta:image-count="0" meta:object-count="0" meta:page-count="1" meta:paragraph-count="18" meta:word-count="486" meta:character-count="2520" meta:non-whitespace-character-count="2052"/>
  </office:meta>
</office:document-meta>
</file>