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fo:font-size="13pt" officeooo:rsid="01d74f08" officeooo:paragraph-rsid="01e115a9" style:font-size-asian="13pt" style:font-size-complex="13pt"/>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style:writing-mode="lr-tb"/>
      <style:text-properties fo:font-size="13pt" officeooo:paragraph-rsid="01ef3a07" style:font-size-asian="13pt" style:font-size-complex="13pt"/>
    </style:style>
    <style:style style:name="P22"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style:writing-mode="lr-tb"/>
      <style:text-properties fo:font-size="13pt" officeooo:paragraph-rsid="01dd3a06" style:font-size-asian="13pt" style:font-size-complex="13pt"/>
    </style:style>
    <style:style style:name="P26"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7" style:family="paragraph" style:parent-style-name="Preformatted_20_Text">
      <style:text-properties fo:font-size="13pt" officeooo:paragraph-rsid="01c26751" style:font-size-asian="13pt" style:font-size-complex="13pt"/>
    </style:style>
    <style:style style:name="P28" style:family="paragraph" style:parent-style-name="Preformatted_20_Text">
      <style:paragraph-properties fo:break-before="page"/>
      <style:text-properties style:font-name="Liberation Sans" fo:font-size="13pt" fo:font-style="normal" style:text-underline-style="none" officeooo:rsid="01efb23b" officeooo:paragraph-rsid="01efb23b" fo:background-color="transparent" style:font-size-asian="13pt" style:font-style-asian="normal" style:font-size-complex="13pt" style:font-style-complex="normal"/>
    </style:style>
    <style:style style:name="P29" style:family="paragraph" style:parent-style-name="Preformatted_20_Text">
      <style:text-properties style:font-name="Liberation Sans" fo:font-size="13pt" fo:font-style="normal" style:text-underline-style="none" officeooo:rsid="01ef3a07" officeooo:paragraph-rsid="01ef3a07" fo:background-color="transparent" style:font-size-asian="13pt" style:font-style-asian="normal" style:font-size-complex="13pt" style:font-style-complex="normal"/>
    </style:style>
    <style:style style:name="P30"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31" style:family="paragraph" style:parent-style-name="Preformatted_20_Text">
      <style:text-properties fo:font-size="14pt" officeooo:rsid="0048b50d" officeooo:paragraph-rsid="01ef3a07" style:font-size-asian="14pt" style:font-size-complex="14pt" loext:padding="0cm" loext:border="none"/>
    </style:style>
    <style:style style:name="T1" style:family="text">
      <style:text-properties style:font-name="Liberation Sans" fo:font-size="16pt" fo:font-weight="bold" officeooo:rsid="01f2a193"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0dd66a" style:font-size-asian="16pt" style:font-weight-asian="bold" style:font-size-complex="16pt" style:font-weight-complex="bold"/>
    </style:style>
    <style:style style:name="T5" style:family="text">
      <style:text-properties style:font-name="Liberation Sans" fo:font-size="16pt" fo:font-weight="bold" officeooo:rsid="01f2a193" style:font-size-asian="16pt" style:font-weight-asian="bold" style:font-size-complex="16pt" style:font-weight-complex="bold"/>
    </style:style>
    <style:style style:name="T6" style:family="text">
      <style:text-properties officeooo:rsid="01f4428c"/>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f4428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15a69" style:font-style-asian="normal" style:font-style-complex="normal"/>
    </style:style>
    <style:style style:name="T20" style:family="text">
      <style:text-properties style:font-name="Liberation Sans" fo:font-style="normal" style:text-underline-style="none" style:font-style-asian="normal" style:font-style-complex="normal"/>
    </style:style>
    <style:style style:name="T21" style:family="text">
      <style:text-properties style:font-name="Liberation Sans" fo:font-style="normal" style:text-underline-style="none" officeooo:rsid="01ee2e52" style:font-style-asian="normal" style:font-style-complex="normal"/>
    </style:style>
    <style:style style:name="T22" style:family="text">
      <style:text-properties style:font-name="Liberation Sans" fo:font-style="normal" style:text-underline-style="none" officeooo:rsid="01f4428c" style:font-style-asian="normal" style:font-style-complex="normal"/>
    </style:style>
    <style:style style:name="T23" style:family="text">
      <style:text-properties style:font-name="Liberation Sans" fo:font-style="normal" style:text-underline-style="none" officeooo:rsid="01e115a9" style:font-style-asian="normal" style:font-style-complex="normal"/>
    </style:style>
    <style:style style:name="T24" style:family="text">
      <style:text-properties officeooo:rsid="01ee2e52"/>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caa47b"/>
    </style:style>
    <style:style style:name="T29" style:family="text">
      <style:text-properties officeooo:rsid="01d74f08"/>
    </style:style>
    <style:style style:name="T30" style:family="text">
      <style:text-properties officeooo:rsid="01db7a8a"/>
    </style:style>
    <style:style style:name="T31" style:family="text">
      <style:text-properties officeooo:rsid="01ef3a07"/>
    </style:style>
    <style:style style:name="T32" style:family="text">
      <style:text-properties officeooo:rsid="01f51d2d"/>
    </style:style>
    <style:style style:name="T33"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f51d2d"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f58a85"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3c55a1" fo:background-color="transparent" loext:char-shading-value="0" style:font-style-asian="normal" style:font-style-complex="normal"/>
    </style:style>
    <style:style style:name="T51"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3rd</text:span><text:span text:style-name="T2"> </text:span><text:span text:style-name="T1">May</text:span><text:span text:style-name="T3"> 20</text:span><text:span text:style-name="T4">2</text:span><text:span text:style-name="T5">6</text:span></text:p>
      <text:p text:style-name="P3">Psalm <text:span text:style-name="T6">40:1</text:span></text:p>
      <text:p text:style-name="P4">I waited patiently for the Lord; <text:span text:style-name="T6">H</text:span>e inclined to me and heard my cry.</text:p>
      <text:p text:style-name="P5"/>
      <text:p text:style-name="P6">Let us pray…</text:p>
      <text:p text:style-name="P6"/>
      <text:p text:style-name="P7">Thanks to God</text:p>
      <text:p text:style-name="P8"><text:span text:style-name="T7">O </text:span><text:span text:style-name="T8">L</text:span><text:span text:style-name="T9">o</text:span><text:span text:style-name="T8">r</text:span><text:span text:style-name="T9">d,</text:span><text:span text:style-name="T10"> </text:span><text:span text:style-name="T11">we </text:span><text:span text:style-name="T12">thank You that </text:span><text:span text:style-name="T13">You </text:span><text:span text:style-name="T14">are ever-ready to </text:span><text:span text:style-name="T15">listen when we call </text:span><text:span text:style-name="T14">upon</text:span><text:span text:style-name="T15"> You.</text:span></text:p>
      <text:p text:style-name="P9"/>
      <text:p text:style-name="P10"><text:span text:style-name="T16">We </text:span><text:span text:style-name="T14">acknowledge that</text:span><text:span text:style-name="T17"> we are sinners </text:span><text:span text:style-name="T14">in need of a Saviour,</text:span><text:span text:style-name="T16"> </text:span><text:span text:style-name="T14">and w</text:span><text:span text:style-name="T18">e thank You </text:span><text:span text:style-name="T15">for sending Jesus to </text:span><text:span text:style-name="T14">take our place on the Cross, to absorb the wrath of a holy God against our rebellion, and the free us from our condition of slavery to sin</text:span><text:span text:style-name="T15">.</text:span></text:p>
      <text:p text:style-name="P11"/>
      <text:p text:style-name="P12"><text:span text:style-name="T19">W</text:span><text:span text:style-name="T20">e thank You that </text:span><text:span text:style-name="T21">we will shortly take part in the Lord’s Supper, commemorating the Cross and </text:span><text:span text:style-name="T22">the </text:span><text:span text:style-name="T21">Resurrection</text:span><text:span text:style-name="T23">.</text:span></text:p>
      <text:p text:style-name="P13"/>
      <text:p text:style-name="P13"><text:span text:style-name="T24">We thank You for the Holy Spirit, </text:span><text:span text:style-name="T6">Who is</text:span><text:span text:style-name="T24"> with us daily, enabl</text:span><text:span text:style-name="T6">ing</text:span><text:span text:style-name="T24"> us to resist temptation, </text:span><text:span text:style-name="T6">as well as</text:span><text:span text:style-name="T24"> </text:span><text:span text:style-name="T6">comforting us as we support Jan at this time of Allan’s passing into glory.</text:span></text:p>
      <text:p text:style-name="P14"/>
      <text:p text:style-name="P15"><text:span text:style-name="T25">The Wide World...</text:span><text:span text:style-name="T26"> a</text:span><text:span text:style-name="T25">nd the </text:span><text:span text:style-name="T27">W</text:span><text:span text:style-name="T25">ider Church</text:span></text:p>
      <text:p text:style-name="P16"><text:span text:style-name="T28">W</text:span><text:span text:style-name="T29">e </text:span><text:span text:style-name="T6">thank You for the sure hope we have in Jesus’ return as we </text:span><text:span text:style-name="T30">pray</text:span><text:span text:style-name="T29"> for this </text:span><text:span text:style-name="T28">world </text:span><text:span text:style-name="T29">where </text:span><text:span text:style-name="T30">so m</text:span><text:span text:style-name="T31">any live </text:span><text:span text:style-name="T6">without </text:span><text:span text:style-name="T32">any</text:span><text:span text:style-name="T6"> hope. </text:span><text:span text:style-name="T32">We pray for peace in the many trouble spots around the globe, for strength and perseverance for missionaries near the front lines, ministering to the needs of refugees. We remember the persecuted church in places such as West Africa and East Asia, and the struggling churches in Europe which in past times were the home of the gospel.</text:span></text:p>
      <text:p text:style-name="P16"/>
      <text:p text:style-name="P17">We <text:span text:style-name="T32">thank You</text:span><text:span text:style-name="T31"> for the many churches </text:span><text:span text:style-name="T32">around Australia </text:span><text:span text:style-name="T31">where Your Word is faithfully preached and lived, </text:span><text:span text:style-name="T32">where that assurance of hope is declared boldly </text:span><text:span text:style-name="T31">and ask that You would strengthen </text:span><text:span text:style-name="T32">us to continue living according to Kingdom values rather than following the world’s ways.</text:span></text:p>
      <text:p text:style-name="P17"/>
      <text:p text:style-name="P18">Ashburton</text:p>
      <text:p text:style-name="P19"><text:span text:style-name="T33">W</text:span><text:span text:style-name="T34">e pray for our </text:span><text:span text:style-name="T35">work</text:span><text:span text:style-name="T36"> </text:span><text:span text:style-name="T33">here at Ashburton, </text:span><text:span text:style-name="T36">as we </text:span><text:span text:style-name="T37">also labour with our various talents and abilities in the work of the Kingdom. </text:span><text:span text:style-name="T38">We thank You for the PCV, and for the wisdom and support available to us from the Presbytery and Assembly. We pray that You would continue to strengthen Rod as our Moderator, as he serves the churches across Victoria, and our missionaries in many places.</text:span></text:p>
      <text:p text:style-name="P20"/>
      <text:p text:style-name="P21"><text:span text:style-name="T37">W</text:span><text:span text:style-name="T39">e </text:span><text:span text:style-name="T38">continue to</text:span><text:span text:style-name="T39"> pray for the Selection Committee</text:span><text:span text:style-name="T37">, </text:span><text:span text:style-name="T39">as they </text:span><text:span text:style-name="T37">seek </text:span><text:span text:style-name="T39">Your wisdom </text:span><text:span text:style-name="T38">and direction in the search for </text:span><text:span text:style-name="T37">a </text:span><text:span text:style-name="T39">new minister </text:span><text:span text:style-name="T37">of Your choosing, to </text:span><text:span text:style-name="T38">lead Your work here</text:span><text:span text:style-name="T39">. </text:span><text:span text:style-name="T37">We pray for ourselves to </text:span><text:span text:style-name="T40">support them in their work</text:span><text:span text:style-name="T37">.</text:span></text:p>
      <text:p text:style-name="P22"/>
      <text:p text:style-name="P23"><text:span text:style-name="T41">We </text:span><text:span text:style-name="T39">continue</text:span><text:span text:style-name="T42"> </text:span><text:span text:style-name="T35">in</text:span><text:span text:style-name="T41"> pray</text:span><text:span text:style-name="T35">er</text:span><text:span text:style-name="T41"> for</text:span><text:span text:style-name="T43"> </text:span><text:span text:style-name="T39">those in need of Your healing hand – for </text:span><text:span text:style-name="T33">Diane</text:span><text:span text:style-name="T37"> </text:span><text:span text:style-name="T33">and others affected by illness or injury. </text:span><text:span text:style-name="T44">We again pray for Your strength and encouragement for Jan as she adjusts to life without Allan.</text:span></text:p>
      <text:p text:style-name="P24"/>
      <text:p text:style-name="P25"><text:span text:style-name="T45">We thank You for </text:span><text:span text:style-name="T35">Your Word, and for </text:span><text:span text:style-name="T44">Rod </text:span><text:span text:style-name="T40">as</text:span><text:span text:style-name="T35"> he preach</text:span><text:span text:style-name="T40">es</text:span><text:span text:style-name="T35"> today. </text:span><text:span text:style-name="T40">We pray that we would </text:span><text:span text:style-name="T44">not miss what You bring us through him, but that we would hold fast to what is true</text:span><text:span text:style-name="T40">.</text:span></text:p>
      <text:p text:style-name="P26"/>
      <text:p text:style-name="P27"><text:span text:style-name="T46">In </text:span><text:span text:style-name="T44">Jesus</text:span><text:span text:style-name="T47"> </text:span><text:span text:style-name="T48">Precious Name </text:span><text:span text:style-name="T49">we pray</text:span><text:span text:style-name="T50">, </text:span><text:span text:style-name="T51">Amen.</text:span></text:p>
      <text:p text:style-name="P28">As we will shortly take part in the Lord’s Supper, let is recall the fundamentals of our faith by reciting <text:span text:style-name="T31">The Apostle’s Creed:</text:span></text:p>
      <text:p text:style-name="P29"/>
      <text:p text:style-name="P30">I believe in God, the Father almighty,</text:p>
      <text:p text:style-name="P30"><text:s text:c="6"/>creator of heaven and earth.</text:p>
      <text:p text:style-name="P30"/>
      <text:p text:style-name="P30">I believe in Jesus Christ, his only Son, our Lord,</text:p>
      <text:p text:style-name="P30"><text:s text:c="6"/>who was conceived by the Holy Spirit</text:p>
      <text:p text:style-name="P30"><text:s text:c="6"/>and born of the virgin Mary.</text:p>
      <text:p text:style-name="P30"><text:s text:c="6"/>He suffered under Pontius Pilate,</text:p>
      <text:p text:style-name="P30"><text:s text:c="6"/>was crucified, died, and was buried;</text:p>
      <text:p text:style-name="P30"><text:s text:c="6"/>he descended to hell.</text:p>
      <text:p text:style-name="P30"><text:s text:c="6"/>The third day he rose again from the dead.</text:p>
      <text:p text:style-name="P30"><text:s text:c="6"/>He ascended to heaven</text:p>
      <text:p text:style-name="P30"><text:s text:c="6"/>and is seated at the right hand of God the Father almighty.</text:p>
      <text:p text:style-name="P30"><text:s text:c="6"/>From there he will come to judge the living and the dead.</text:p>
      <text:p text:style-name="P30"/>
      <text:p text:style-name="P30">I believe in the Holy Spirit,</text:p>
      <text:p text:style-name="P30"><text:s text:c="6"/>the holy catholic* church,</text:p>
      <text:p text:style-name="P30"><text:s text:c="6"/>the communion of saints,</text:p>
      <text:p text:style-name="P30"><text:s text:c="6"/>the forgiveness of sins,</text:p>
      <text:p text:style-name="P30"><text:s text:c="6"/>the resurrection of the body,</text:p>
      <text:p text:style-name="P30"><text:s text:c="6"/>and the life everlasting. Amen.</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5-02T21:44:45.608775673</dc:date>
    <meta:editing-duration>PT19H24M21S</meta:editing-duration>
    <meta:editing-cycles>205</meta:editing-cycles>
    <meta:generator>LibreOffice/26.2.2.2$Linux_X86_64 LibreOffice_project/620$Build-2</meta:generator>
    <meta:print-date>2025-09-06T23:29:48.038812840</meta:print-date>
    <meta:printed-by>PDF files</meta:printed-by>
    <meta:document-statistic meta:table-count="0" meta:image-count="0" meta:object-count="0" meta:page-count="2" meta:paragraph-count="38" meta:word-count="612" meta:character-count="3360" meta:non-whitespace-character-count="2695"/>
  </office:meta>
</office:document-meta>
</file>