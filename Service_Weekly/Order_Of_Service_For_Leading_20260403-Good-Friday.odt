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/ <text:span text:style-name="Strong_20_Emphasis">Opening prayer</text:span> (Aditya Kuthalam)</text:p>
      <text:p text:style-name="P2"><text:span text:style-name="Strong_20_Emphasis">Praise</text:span>: <text:span text:style-name="Emphasis">Praise to the Lord, the Almighty</text:span> - Rejoice! 46</text:p>
      <text:p text:style-name="P2"><text:span text:style-name="Strong_20_Emphasis">Bible Reading</text:span>: Isaiah 53:1-12 (Callum)</text:p>
      <text:p text:style-name="P2"><text:span text:style-name="Strong_20_Emphasis">Announcements</text:span> (JA)</text:p>
      <text:list text:style-name="L1">
        <text:list-item>
          <text:p text:style-name="P3">Offering today for HCCC</text:p>
        </text:list-item>
        <text:list-item>
          <text:p text:style-name="P3">Easter Day still a communion service</text:p>
        </text:list-item>
      </text:list>
      <text:p text:style-name="P2"><text:span text:style-name="Strong_20_Emphasis">HCCC Video</text:span></text:p>
      <text:p text:style-name="P2"><text:span text:style-name="Strong_20_Emphasis">Praise</text:span>: <text:span text:style-name="Emphasis">There is a Fountain Filled with Blood</text:span> - Rejoice! 207</text:p>
      <text:p text:style-name="P2"><text:span text:style-name="Strong_20_Emphasis">Praise</text:span>: <text:span text:style-name="Emphasis">When I Survey the Wondrous Cross</text:span> - Rejoice! 218 (offering)</text:p>
      <text:p text:style-name="P2"><text:span text:style-name="Strong_20_Emphasis">Bible reading</text:span>: Luke 23:13-49 (MarJo)</text:p>
      <text:p text:style-name="P2"><text:span text:style-name="Strong_20_Emphasis">Sermon</text:span>: WHAT’S SO GOOD ABOUT GOOD FRIDAY? (Aditya K)</text:p>
      <text:p text:style-name="P2"><text:span text:style-name="Strong_20_Emphasis">Praise</text:span>: <text:span text:style-name="Emphasis">Rock of Ages, Cleft for Me</text:span> - Rejoice! 409</text:p>
      <text:p text:style-name="P2"><text:span text:style-name="Strong_20_Emphasis">Benediction</text:span> (Aditya K)</text:p>
      <text:p text:style-name="P2"><text:span text:style-name="Strong_20_Emphasis">Sermon Outline</text:span></text:p>
      <text:p text:style-name="P2">“WHAT’S SO GOOD ABOUT GOOD FRIDAY”   (Luke 23:13-49)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7500"/>
    </style:style>
    <style:style style:name="MT2" style:family="text">
      <style:text-properties officeooo:rsid="004c95cc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3rd</text:span> <text:span text:style-name="MT2">April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4-02T11:19:03.891907049</dc:date>
    <meta:editing-duration>PT6H36M1S</meta:editing-duration>
    <meta:editing-cycles>49</meta:editing-cycles>
    <meta:generator>LibreOffice/25.8.5.2$Linux_X86_64 LibreOffice_project/580$Build-2</meta:generator>
    <meta:print-date>2024-02-03T21:06:33.278074986</meta:print-date>
    <meta:document-statistic meta:table-count="0" meta:image-count="0" meta:object-count="0" meta:page-count="1" meta:paragraph-count="16" meta:word-count="104" meta:character-count="613" meta:non-whitespace-character-count="525"/>
  </office:meta>
</office:document-meta>
</file>