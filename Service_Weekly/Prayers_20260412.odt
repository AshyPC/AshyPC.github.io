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f18283" officeooo:paragraph-rsid="01f18283"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2"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f270a9" officeooo:paragraph-rsid="01f270a9" style:font-name-asian="Nimbus Mono L" style:font-size-asian="13pt" style:font-style-asian="normal" style:font-name-complex="Liberation Mono" style:font-size-complex="13pt" style:font-style-complex="normal"/>
    </style:style>
    <style:style style:name="P14" style:family="paragraph" style:parent-style-name="Preformatted_20_Text">
      <style:paragraph-properties style:writing-mode="lr-tb" style:writing-mode-automatic="false"/>
      <style:text-properties style:font-name="Liberation Sans" fo:font-size="13pt" fo:font-style="normal" style:text-underline-style="none" officeooo:rsid="01f364ce" officeooo:paragraph-rsid="01f364ce"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f270a9"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fo:font-size="13pt" officeooo:paragraph-rsid="01dd3a06" style:font-size-asian="13pt" style:font-size-complex="13pt"/>
    </style:style>
    <style:style style:name="P21"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paragraph-properties style:writing-mode="lr-tb"/>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text-properties fo:font-size="13pt" officeooo:paragraph-rsid="01c26751" style:font-size-asian="13pt" style:font-size-complex="13pt"/>
    </style:style>
    <style:style style:name="P25" style:family="paragraph" style:parent-style-name="Preformatted_20_Text">
      <style:text-properties fo:font-size="14pt" officeooo:rsid="0048b50d" officeooo:paragraph-rsid="01efb23b" style:font-size-asian="14pt" style:font-size-complex="14pt" loext:padding="0cm" loext:border="none"/>
    </style:style>
    <style:style style:name="T1" style:family="text">
      <style:text-properties style:font-name="Liberation Sans" fo:font-size="16pt" fo:font-weight="bold" officeooo:rsid="01f162e7"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162e7" style:font-size-asian="16pt" style:font-weight-asian="bold" style:font-size-complex="16pt" style:font-weight-complex="bold"/>
    </style:style>
    <style:style style:name="T7"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f270a9"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6" style:family="text">
      <style:text-properties style:font-name="Liberation Sans" fo:font-style="normal" style:text-underline-style="none"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9" style:family="text">
      <style:text-properties fo:font-weight="bold" style:font-weight-asian="bold" style:font-weight-complex="bold"/>
    </style:style>
    <style:style style:name="T20" style:family="text">
      <style:text-properties fo:font-weight="bold" officeooo:rsid="000dd66a" style:font-weight-asian="bold" style:font-weight-complex="bold"/>
    </style:style>
    <style:style style:name="T21" style:family="text">
      <style:text-properties fo:font-weight="bold" officeooo:rsid="0160cefc" style:font-weight-asian="bold" style:font-weight-complex="bold"/>
    </style:style>
    <style:style style:name="T22" style:family="text">
      <style:text-properties officeooo:rsid="01f364ce"/>
    </style:style>
    <style:style style:name="T23" style:family="text">
      <style:text-properties officeooo:rsid="01caa47b"/>
    </style:style>
    <style:style style:name="T24" style:family="text">
      <style:text-properties officeooo:rsid="01d74f08"/>
    </style:style>
    <style:style style:name="T25" style:family="text">
      <style:text-properties officeooo:rsid="01db7a8a"/>
    </style:style>
    <style:style style:name="T26" style:family="text">
      <style:text-properties officeooo:rsid="01ef3a07"/>
    </style:style>
    <style:style style:name="T27" style:family="text">
      <style:text-properties officeooo:rsid="01f51774"/>
    </style:style>
    <style:style style:name="T28"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f51774"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f6ef65"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3c55a1" fo:background-color="transparent" loext:char-shading-value="0" style:font-style-asian="normal" style:font-style-complex="normal"/>
    </style:style>
    <style:style style:name="T45"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2</text:span><text:span text:style-name="T2">th</text:span><text:span text:style-name="T3"> </text:span><text:span text:style-name="T1">April</text:span><text:span text:style-name="T4"> 20</text:span><text:span text:style-name="T5">2</text:span><text:span text:style-name="T6">6</text:span></text:p>
      <text:p text:style-name="P3">Hebrews 4:16</text:p>
      <text:p text:style-name="P4">Therefore let us draw near with confidence to the throne of grace, so that we may receive mercy and find grace to help in time of need</text:p>
      <text:p text:style-name="P5"/>
      <text:p text:style-name="P6">Let us pray…</text:p>
      <text:p text:style-name="P6"/>
      <text:p text:style-name="P7">Thanks to God</text:p>
      <text:p text:style-name="P8"><text:span text:style-name="T7">O </text:span><text:span text:style-name="T8">L</text:span><text:span text:style-name="T9">o</text:span><text:span text:style-name="T8">r</text:span><text:span text:style-name="T9">d,</text:span><text:span text:style-name="T10"> </text:span><text:span text:style-name="T11">we </text:span><text:span text:style-name="T12">thank You that </text:span><text:span text:style-name="T13">You </text:span><text:span text:style-name="T14">receive us with mercy when we approach Your throne of grace</text:span><text:span text:style-name="T15">.</text:span></text:p>
      <text:p text:style-name="P9"/>
      <text:p text:style-name="P10"><text:span text:style-name="T16">We </text:span><text:span text:style-name="T15">know</text:span><text:span text:style-name="T16"> that </text:span><text:span text:style-name="T17">we could not </text:span><text:span text:style-name="T14">com</text:span><text:span text:style-name="T17">e </text:span><text:span text:style-name="T14">except for the saving work of</text:span><text:span text:style-name="T15"> Jesus, </text:span><text:span text:style-name="T14">and His intercession on our behalf</text:span><text:span text:style-name="T15">. We thank You </text:span><text:span text:style-name="T18">that we have been </text:span><text:span text:style-name="T16">forgiven </text:span><text:span text:style-name="T17">b</text:span><text:span text:style-name="T14">ecause He went to the Cross</text:span><text:span text:style-name="T16">,</text:span><text:span text:style-name="T14">on our behalf</text:span><text:span text:style-name="T18">. </text:span><text:span text:style-name="T14">We recognise that You are the One and Only God, holy and righteous, but we thank You that we can come confidently because Jesus has taken away our sin and given us His righteousness as a free gift.</text:span></text:p>
      <text:p text:style-name="P11"/>
      <text:p text:style-name="P12"><text:span text:style-name="T19">The Wide World...</text:span><text:span text:style-name="T20"> a</text:span><text:span text:style-name="T19">nd the </text:span><text:span text:style-name="T21">W</text:span><text:span text:style-name="T19">ider Church</text:span></text:p>
      <text:p text:style-name="P13">We thank You for the Church, the Body of Christ, the pillar of Truth, down through the ages. We remember the cloud of witnesses, those who have gone before us, who have taken Your Word to every corner of this world, and those who dared to witness to us of Your love for a lost world, <text:span text:style-name="T22">and especially Your particular love for us as individuals.</text:span></text:p>
      <text:p text:style-name="P13"/>
      <text:p text:style-name="P14">We thank You for the Holy Spirit Who led and guided those who preserved and translated Your written Word so that we could read it for ourselves, and be guided by Your wisdom daily. We thank You for the work of SIL and Wycliffe, and we thank You for calling people to serve in so many ways to carry on that work today. We pray for Sebastian and Betty and the family as they prepare to return to PNG, after a long break. Grant them strength, endurance and clarity of vision, so that they may overcome any hurdles that would hinder them from doing Your will.</text:p>
      <text:p text:style-name="P14"/>
      <text:p text:style-name="P15"><text:span text:style-name="T23">W</text:span><text:span text:style-name="T24">e </text:span><text:span text:style-name="T25">pray</text:span><text:span text:style-name="T24"> for this </text:span><text:span text:style-name="T23">world </text:span><text:span text:style-name="T24">where </text:span><text:span text:style-name="T25">so m</text:span><text:span text:style-name="T26">any live </text:span><text:span text:style-name="T27">in darkness, and we long for them to see the light of the gospel in their own language as the work of translation continues to bring them to the Cross, to know Your love, as we know it here.</text:span></text:p>
      <text:p text:style-name="P16"/>
      <text:p text:style-name="P17">Ashburton</text:p>
      <text:p text:style-name="P18"><text:span text:style-name="T28">W</text:span><text:span text:style-name="T29">e pray for our </text:span><text:span text:style-name="T30">work</text:span><text:span text:style-name="T31"> </text:span><text:span text:style-name="T28">here at Ashburton, </text:span><text:span text:style-name="T31">a</text:span><text:span text:style-name="T32">nd we dedicate ourselves afresh in Your service, so that we too may see the good news spread far and wide. May all we do and say be a blessing to one another, as well as to those we meet with daily, knowing that our own nation is as much a mission field as any other.</text:span></text:p>
      <text:p text:style-name="P19"/>
      <text:p text:style-name="P20"><text:span text:style-name="T33">We </text:span><text:span text:style-name="T34">continue</text:span><text:span text:style-name="T35"> </text:span><text:span text:style-name="T30">in</text:span><text:span text:style-name="T33"> pray</text:span><text:span text:style-name="T30">er</text:span><text:span text:style-name="T33"> for</text:span><text:span text:style-name="T36"> </text:span><text:span text:style-name="T34">those in need </text:span><text:span text:style-name="T32">among us, as we express our care for each other, and our desire to grow in grace, in fellowship and in Godly wisdom, so that the Body of Christ here may be built up to fulfill Your purposes more fully.</text:span></text:p>
      <text:p text:style-name="P21"/>
      <text:p text:style-name="P22"><text:span text:style-name="T37">We thank You for </text:span><text:span text:style-name="T30">Your Word, and for</text:span><text:span text:style-name="T38"> </text:span><text:span text:style-name="T39">Harrison </text:span><text:span text:style-name="T38">as</text:span><text:span text:style-name="T30"> he preach</text:span><text:span text:style-name="T38">es</text:span><text:span text:style-name="T30"> today. </text:span><text:span text:style-name="T38">We pray that we would be diligent hearers and do-ers of Your Word, making the most of the means of grace, </text:span><text:span text:style-name="T39">and that we may encourage him as he preaches</text:span><text:span text:style-name="T38">.</text:span></text:p>
      <text:p text:style-name="P23"/>
      <text:p text:style-name="P24"><text:span text:style-name="T40">In </text:span><text:span text:style-name="T39">Jesus’</text:span><text:span text:style-name="T41"> </text:span><text:span text:style-name="T42">Precious Name </text:span><text:span text:style-name="T43">we pray</text:span><text:span text:style-name="T44">, </text:span><text:span text:style-name="T45">Amen.</text:span></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4-11T21:10:44.115903458</dc:date>
    <meta:editing-duration>PT17H58M20S</meta:editing-duration>
    <meta:editing-cycles>205</meta:editing-cycles>
    <meta:generator>LibreOffice/26.2.2.2$Linux_X86_64 LibreOffice_project/620$Build-2</meta:generator>
    <meta:print-date>2025-09-06T23:29:48.038812840</meta:print-date>
    <meta:printed-by>PDF files</meta:printed-by>
    <meta:document-statistic meta:table-count="0" meta:image-count="0" meta:object-count="0" meta:page-count="1" meta:paragraph-count="17" meta:word-count="526" meta:character-count="2678" meta:non-whitespace-character-count="2169"/>
  </office:meta>
</office:document-meta>
</file>