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/>
    </style:style>
    <style:style style:name="P2" style:family="paragraph" style:parent-style-name="Text_20_body" style:list-style-name="L1">
      <style:paragraph-properties fo:margin-top="0cm" fo:margin-bottom="0.499cm" style:contextual-spacing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540089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 ) / <text:span text:style-name="Strong_20_Emphasis">Opening prayer</text:span> (Matthew L)</text:p>
      <text:p text:style-name="P1"><text:span text:style-name="Strong_20_Emphasis">Praise</text:span>: <text:span text:style-name="Emphasis">Holy Holy Holy</text:span></text:p>
      <text:p text:style-name="P1"><text:span text:style-name="Strong_20_Emphasis">Bible Reading</text:span>: Deuteronomy 7:1-11 (Stephen A)</text:p>
      <text:p text:style-name="P1"><text:span text:style-name="Strong_20_Emphasis">Announcements</text:span> (Matt L)</text:p>
      <text:list text:style-name="L1">
        <text:list-item>
          <text:p text:style-name="P2">Evening Prayer Service - 31st May</text:p>
        </text:list-item>
      </text:list>
      <text:p text:style-name="P1"><text:span text:style-name="Strong_20_Emphasis">Sunday School</text:span> (Mia O, Jack W)</text:p>
      <text:p text:style-name="P1"><text:span text:style-name="Strong_20_Emphasis">Praise</text:span>: <text:span text:style-name="Emphasis">Come Thou Fount</text:span></text:p>
      <text:p text:style-name="P1"><text:span text:style-name="Strong_20_Emphasis">Mission Spot</text:span> - Blue Moose (Stephen A)</text:p>
      <text:p text:style-name="P1"><text:span text:style-name="Strong_20_Emphasis">Prayer for the church and the world</text:span> (Matt L)</text:p>
      <text:p text:style-name="P1"><text:span text:style-name="Strong_20_Emphasis">Praise</text:span>: <text:span text:style-name="Emphasis">Sing Them Over Again To Me (Rejoice 378)</text:span><text:span text:style-name="Emphasis"><text:span text:style-name="T1"> </text:span></text:span><text:span text:style-name="Emphasis"><text:span text:style-name="T2">Offering</text:span></text:span></text:p>
      <text:p text:style-name="P1"><text:span text:style-name="Strong_20_Emphasis">Bible reading</text:span>: Ephesians 1:1-6 (Matt L)</text:p>
      <text:p text:style-name="P1"><text:span text:style-name="Strong_20_Emphasis">Sermon</text:span>: “OUR FATHER IN HEAVEN” (Matt L)</text:p>
      <text:p text:style-name="P1"><text:span text:style-name="Strong_20_Emphasis">Praise</text:span>: <text:span text:style-name="Emphasis">Amazing Grace</text:span></text:p>
      <text:p text:style-name="P1"><text:span text:style-name="Strong_20_Emphasis">Benediction</text:span> (Matt L)</text:p>
      <text:p text:style-name="P1"><text:span text:style-name="Strong_20_Emphasis">Sermon Outline</text:span></text:p>
      <text:p text:style-name="P1">“OUR FATHER IN HEAVEN”   (Ephesians 1:1-6)</text:p>
      <text:p text:style-name="P1">Introduction</text:p>
      <text:p text:style-name="P1"/>
      <text:p text:style-name="P1"/>
      <text:p text:style-name="P1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40089"/>
    </style:style>
    <style:style style:name="MT2" style:family="text">
      <style:text-properties officeooo:rsid="0050d310"/>
    </style:style>
    <style:style style:name="MT3" style:family="text">
      <style:text-properties officeooo:rsid="00495328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</text:span><text:span text:style-name="MT2">7</text:span><text:span text:style-name="MT3">th</text:span> <text:span text:style-name="MT1">May</text:span><text:span text:style-name="MT4"> 202</text:span><text:span text:style-name="MT1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5-16T21:14:52.874498340</dc:date>
    <meta:editing-duration>PT6H37M28S</meta:editing-duration>
    <meta:editing-cycles>49</meta:editing-cycles>
    <meta:generator>LibreOffice/26.2.2.2$Linux_X86_64 LibreOffice_project/620$Build-2</meta:generator>
    <meta:print-date>2024-02-03T21:06:33.278074986</meta:print-date>
    <meta:document-statistic meta:table-count="0" meta:image-count="0" meta:object-count="0" meta:page-count="1" meta:paragraph-count="19" meta:word-count="101" meta:character-count="588" meta:non-whitespace-character-count="505"/>
  </office:meta>
</office:document-meta>
</file>