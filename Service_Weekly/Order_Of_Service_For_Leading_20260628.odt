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 style:list-style-name="L1">
      <style:paragraph-properties fo:margin-top="0cm" fo:margin-bottom="0.499cm" style:contextual-spacing="false" fo:line-height="150%"/>
      <style:text-properties officeooo:rsid="00567f84" officeooo:paragraph-rsid="00567f84"/>
    </style:style>
    <style:style style:name="P5" style:family="paragraph" style:parent-style-name="Text_20_body">
      <style:paragraph-properties fo:margin-left="0cm" fo:margin-top="0cm" fo:margin-bottom="0.101cm" style:contextual-spacing="false" fo:line-height="115%" fo:text-indent="0cm" style:auto-text-indent="false"/>
      <style:text-properties officeooo:paragraph-rsid="00587489"/>
    </style:style>
    <style:style style:name="P6" style:family="paragraph" style:parent-style-name="Text_20_body">
      <style:paragraph-properties fo:margin-left="1.251cm" fo:margin-top="0cm" fo:margin-bottom="0.499cm" style:contextual-spacing="false" fo:line-height="150%" fo:text-indent="0cm" style:auto-text-indent="false"/>
      <style:text-properties officeooo:paragraph-rsid="00587489"/>
    </style:style>
    <style:style style:name="T1" style:family="text">
      <style:text-properties officeooo:rsid="00567f84"/>
    </style:style>
    <style:style style:name="T2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Rev 21:1-4) / <text:span text:style-name="Strong_20_Emphasis">Opening prayer</text:span> (Harrison S)</text:p>
      <text:p text:style-name="P2"><text:span text:style-name="Strong_20_Emphasis">Praise</text:span>: <text:span text:style-name="Emphasis">Love Divine, All Loves Excelling</text:span></text:p>
      <text:p text:style-name="P2"><text:span text:style-name="Strong_20_Emphasis">Bible Reading</text:span>: Exodus 14:1-18 (Seng)</text:p>
      <text:p text:style-name="P2"><text:span text:style-name="Strong_20_Emphasis">Announcements</text:span> (J<text:span text:style-name="T1">ohn </text:span>A)</text:p>
      <text:list text:style-name="L1">
        <text:list-item>
          <text:p text:style-name="P3">Congregational meeting 5 July - directly after the service</text:p>
        </text:list-item>
        <text:list-item>
          <text:p text:style-name="P4">Selection Committee meeting today after the service (please bring your coffee/morning tea)</text:p>
        </text:list-item>
        <text:list-item>
          <text:p text:style-name="P3">Working Bee 11 July - please let Russell know of anything requiring attention.</text:p>
        </text:list-item>
      </text:list>
      <text:p text:style-name="P2"><text:span text:style-name="Strong_20_Emphasis">Praise</text:span>: <text:span text:style-name="Emphasis">Before the Throne of God Above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Psalm 46 (Callum)</text:p>
      <text:p text:style-name="P2"><text:span text:style-name="Strong_20_Emphasis">Praise</text:span>: <text:span text:style-name="Emphasis">Speak O Lord</text:span> (offering)</text:p>
      <text:p text:style-name="P2"><text:span text:style-name="Strong_20_Emphasis">Sermon</text:span>: “PEACE IN A PEACELESS WORLD” (Harrison S)</text:p>
      <text:p text:style-name="P2"><text:span text:style-name="Strong_20_Emphasis">Praise</text:span>: <text:span text:style-name="Emphasis">God is our Strength and Refuge</text:span></text:p>
      <text:p text:style-name="P2"><text:span text:style-name="Strong_20_Emphasis">Benediction</text:span> (Jude 2) (Harrison S)</text:p>
      <text:p text:style-name="P2"><text:span text:style-name="Strong_20_Emphasis">Sermon Outline</text:span></text:p>
      <text:p text:style-name="P2">“PEACE IN A PEACELESS WORLD”   (Psalm 46)</text:p>
      <text:p text:style-name="P2">Introduction</text:p>
      <text:p text:style-name="P5">God is…</text:p>
      <text:p text:style-name="P6">1. A Steadfast Refuge<text:line-break/>2. A Present Deliverer<text:line-break/>3. A Victorious Warrior</text:p>
      <text:p text:style-name="P2">Conclusion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58340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48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8</text:span><text:span text:style-name="MT3">th</text:span> <text:span text:style-name="MT2">June</text:span><text:span text:style-name="MT4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6-27T19:36:23.373473402</dc:date>
    <meta:editing-duration>PT7H40M22S</meta:editing-duration>
    <meta:editing-cycles>50</meta:editing-cycles>
    <meta:generator>LibreOffice/26.2.4.2$Linux_X86_64 LibreOffice_project/620$Build-2</meta:generator>
    <meta:print-date>2024-02-03T21:06:33.278074986</meta:print-date>
    <meta:document-statistic meta:table-count="0" meta:image-count="0" meta:object-count="0" meta:page-count="1" meta:paragraph-count="21" meta:word-count="138" meta:character-count="834" meta:non-whitespace-character-count="717"/>
  </office:meta>
</office:document-meta>
</file>