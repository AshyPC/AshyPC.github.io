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paragraph-properties style:writing-mode="lr-tb"/>
      <style:text-properties fo:font-size="13pt" officeooo:paragraph-rsid="01db7a8a" style:font-size-asian="13pt" style:font-size-complex="13pt"/>
    </style:style>
    <style:style style:name="P8" style:family="paragraph" style:parent-style-name="Preformatted_20_Text">
      <style:text-properties fo:font-size="13pt" officeooo:paragraph-rsid="01f37fc9" style:font-size-asian="13pt" style:font-size-complex="13pt"/>
    </style:style>
    <style:style style:name="P9" style:family="paragraph" style:parent-style-name="Preformatted_20_Text">
      <style:text-properties style:font-name="Liberation Serif" fo:font-size="13pt" fo:font-style="normal" style:text-underline-style="none" fo:font-weight="bold" officeooo:rsid="01f37fc9" officeooo:paragraph-rsid="01f37fc9" style:font-size-asian="13pt" style:font-style-asian="normal" style:font-weight-asian="bold" style:font-size-complex="13pt" style:font-style-complex="normal" style:font-weight-complex="bold"/>
    </style:style>
    <style:style style:name="P10" style:family="paragraph" style:parent-style-name="Preformatted_20_Text">
      <style:paragraph-properties style:writing-mode="lr-tb" style:writing-mode-automatic="false"/>
      <style:text-properties fo:font-size="13pt" officeooo:rsid="01e115a9" officeooo:paragraph-rsid="01f37fc9"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style:font-name="Liberation Serif" fo:font-size="13pt" fo:font-style="normal" style:text-underline-style="none" fo:font-weight="bold" officeooo:rsid="00083d4b" officeooo:paragraph-rsid="01f37fc9" style:font-name-asian="Nimbus Mono L" style:font-size-asian="13pt" style:font-style-asian="normal" style:font-weight-asian="bold" style:font-name-complex="Liberation Mono" style:font-size-complex="13pt" style:font-style-complex="normal" style:font-weight-complex="bold"/>
    </style:style>
    <style:style style:name="P13" style:family="paragraph" style:parent-style-name="Preformatted_20_Text">
      <style:paragraph-properties style:writing-mode="lr-tb"/>
      <style:text-properties fo:font-size="13pt" officeooo:rsid="01e115a9" officeooo:paragraph-rsid="01f37fc9" style:font-size-asian="13pt" style:font-size-complex="13pt"/>
    </style:style>
    <style:style style:name="P14"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5"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6"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f46537" officeooo:paragraph-rsid="01f46537"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21" style:family="paragraph" style:parent-style-name="Preformatted_20_Text">
      <style:paragraph-properties style:writing-mode="lr-tb"/>
      <style:text-properties fo:font-size="13pt" officeooo:paragraph-rsid="01efb23b" style:font-size-asian="13pt" style:font-size-complex="13pt"/>
    </style:style>
    <style:style style:name="P22" style:family="paragraph" style:parent-style-name="Preformatted_20_Text">
      <style:paragraph-properties style:writing-mode="lr-tb"/>
      <style:text-properties style:font-name="Liberation Sans" fo:font-size="13pt" fo:font-style="normal" style:text-underline-style="none" officeooo:rsid="01d92df6" officeooo:paragraph-rsid="01efb23b"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style:font-name="Liberation Sans" fo:font-size="13pt" fo:font-style="normal" style:text-underline-style="none" officeooo:rsid="01dd3a06" officeooo:paragraph-rsid="01f50b16" fo:background-color="transparent" style:font-size-asian="13pt" style:font-style-asian="normal" style:font-size-complex="13pt" style:font-style-complex="normal"/>
    </style:style>
    <style:style style:name="P24" style:family="paragraph" style:parent-style-name="Preformatted_20_Text">
      <style:paragraph-properties style:writing-mode="lr-tb"/>
      <style:text-properties fo:font-size="13pt" officeooo:paragraph-rsid="01dd3a06" style:font-size-asian="13pt" style:font-size-complex="13pt"/>
    </style:style>
    <style:style style:name="P25"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6"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2908b"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2908b" style:font-size-asian="16pt" style:font-weight-asian="bold" style:font-size-complex="16pt" style:font-weight-complex="bold"/>
    </style:style>
    <style:style style:name="T7" style:family="text">
      <style:text-properties officeooo:rsid="01ee2e52"/>
    </style:style>
    <style:style style:name="T8" style:family="text">
      <style:text-properties officeooo:rsid="01f2908b"/>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f2908b"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8" style:family="text">
      <style:text-properties style:font-name="Liberation Sans" fo:font-style="normal" style:text-underline-style="none"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f37fc9" style:font-name-asian="Nimbus Mono L" style:font-style-asian="normal" style:font-name-complex="Liberation Mono" style:font-style-complex="normal"/>
    </style:style>
    <style:style style:name="T20" style:family="text">
      <style:text-properties style:font-name="Liberation Sans" fo:font-style="normal" style:text-underline-style="none" fo:font-weight="normal" officeooo:rsid="01f37fc9" style:font-name-asian="Nimbus Mono L" style:font-style-asian="normal" style:font-weight-asian="normal" style:font-name-complex="Liberation Mono" style:font-style-complex="normal" style:font-weight-complex="normal"/>
    </style:style>
    <style:style style:name="T21" style:family="text">
      <style:text-properties style:font-name="Liberation Sans" fo:font-style="normal" style:text-underline-style="none" fo:font-weight="normal" officeooo:rsid="01cfe221" style:font-name-asian="Nimbus Mono L" style:font-style-asian="normal" style:font-weight-asian="normal" style:font-name-complex="Liberation Mono" style:font-style-complex="normal" style:font-weight-complex="normal"/>
    </style:style>
    <style:style style:name="T22" style:family="text">
      <style:text-properties style:font-name="Liberation Sans" fo:font-style="normal" style:text-underline-style="none" fo:font-weight="normal" officeooo:rsid="01ee2e52" style:font-name-asian="Nimbus Mono L" style:font-style-asian="normal" style:font-weight-asian="normal" style:font-name-complex="Liberation Mono" style:font-style-complex="normal" style:font-weight-complex="normal"/>
    </style:style>
    <style:style style:name="T23" style:family="text">
      <style:text-properties style:font-name="Liberation Sans" fo:font-style="normal" style:text-underline-style="none" fo:font-weight="normal" officeooo:rsid="01f2908b" style:font-name-asian="Nimbus Mono L" style:font-style-asian="normal" style:font-weight-asian="normal" style:font-name-complex="Liberation Mono" style:font-style-complex="normal" style:font-weight-complex="normal"/>
    </style:style>
    <style:style style:name="T24" style:family="text">
      <style:text-properties officeooo:rsid="01f37fc9"/>
    </style:style>
    <style:style style:name="T25" style:family="text">
      <style:text-properties fo:font-weight="bold" style:font-weight-asian="bold" style:font-weight-complex="bold"/>
    </style:style>
    <style:style style:name="T26" style:family="text">
      <style:text-properties fo:font-weight="bold" officeooo:rsid="000dd66a" style:font-weight-asian="bold" style:font-weight-complex="bold"/>
    </style:style>
    <style:style style:name="T27" style:family="text">
      <style:text-properties fo:font-weight="bold" officeooo:rsid="0160cefc" style:font-weight-asian="bold" style:font-weight-complex="bold"/>
    </style:style>
    <style:style style:name="T28" style:family="text">
      <style:text-properties officeooo:rsid="01f6386a"/>
    </style:style>
    <style:style style:name="T29" style:family="text">
      <style:text-properties officeooo:rsid="01f46537"/>
    </style:style>
    <style:style style:name="T30" style:family="text">
      <style:text-properties officeooo:rsid="01ef3a07"/>
    </style:style>
    <style:style style:name="T3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f50b16"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41" style:family="text">
      <style:text-properties officeooo:rsid="01f50b16"/>
    </style:style>
    <style:style style:name="T42" style:family="text">
      <style:text-properties officeooo:rsid="01f69523"/>
    </style:style>
    <style:style style:name="T43"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3c55a1" fo:background-color="transparent" loext:char-shading-value="0" style:font-style-asian="normal" style:font-style-complex="normal"/>
    </style:style>
    <style:style style:name="T50"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4</text:span><text:span text:style-name="T2">th</text:span><text:span text:style-name="T3"> </text:span><text:span text:style-name="T1">June</text:span><text:span text:style-name="T4"> 20</text:span><text:span text:style-name="T5">2</text:span><text:span text:style-name="T6">6</text:span></text:p>
      <text:p text:style-name="P3">Psalm <text:span text:style-name="T7">8</text:span><text:span text:style-name="T8">0</text:span><text:span text:style-name="T7">:</text:span><text:span text:style-name="T8">17</text:span><text:span text:style-name="T7">-</text:span><text:span text:style-name="T8">1</text:span><text:span text:style-name="T7">9</text:span></text:p>
      <text:p text:style-name="P4">[17] ... let your hand be on the man of your right hand, the son of man whom you have made strong for yourself!<text:line-break/>[18] Then we shall not turn back from you; give us life, and we will call upon your name!<text:line-break/>[19] Restore us, O Lord God of hosts! Let your face shine, that we may be saved!</text:p>
      <text:p text:style-name="P5"/>
      <text:p text:style-name="P6"><text:span text:style-name="T8">As we come to God in prayer, l</text:span>et us pray <text:span text:style-name="T8">together</text:span>…</text:p>
      <text:p text:style-name="P6"/>
      <text:p text:style-name="P7"><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text:span><text:span text:style-name="T15">You </text:span><text:span text:style-name="T16">have made the Son of Man, Jesus, strong to save, strong to restore</text:span><text:span text:style-name="T17">.</text:span></text:p>
      <text:p text:style-name="P8"><text:span text:style-name="T9"/></text:p>
      <text:p text:style-name="P9">Confession</text:p>
      <text:p text:style-name="P10"><text:span text:style-name="T18">We </text:span><text:span text:style-name="T16">kn</text:span><text:span text:style-name="T19">o</text:span><text:span text:style-name="T16">w that </text:span><text:span text:style-name="T19">we had turned back from You, that </text:span><text:span text:style-name="T16">our sins had hidden You from us. </text:span><text:span text:style-name="T19">We </text:span><text:span text:style-name="T16">needed Your face to shine upon us.</text:span></text:p>
      <text:p text:style-name="P11"/>
      <text:p text:style-name="P12">Thanks to God</text:p>
      <text:p text:style-name="P13"><text:span text:style-name="T20">W</text:span><text:span text:style-name="T21">e thank You </text:span><text:span text:style-name="T22">for Jesus’ </text:span><text:span text:style-name="T23">sacrifice on our behalf.</text:span><text:span text:style-name="T22"> </text:span><text:span text:style-name="T20">W</text:span><text:span text:style-name="T23">e now live the redeemed life of </text:span><text:span text:style-name="T22">the Eternal Son of God, </text:span><text:span text:style-name="T20">the spotless Lamb, </text:span><text:span text:style-name="T23">Who rose to bestow on us His righteousness</text:span><text:span text:style-name="T22"> </text:span><text:span text:style-name="T23">by grace, so that we call upon Your Name</text:span><text:span text:style-name="T22">.</text:span></text:p>
      <text:p text:style-name="P14"/>
      <text:p text:style-name="P15"><text:span text:style-name="T7">We thank You for sending the Holy Spirit, </text:span><text:span text:style-name="T24">Giver of Life,</text:span><text:span text:style-name="T7"> to be with us daily, to co</text:span><text:span text:style-name="T24">ntinue the task of sanctifying us, so that we grow to be more like Jesus day by day</text:span><text:span text:style-name="T7">.</text:span></text:p>
      <text:p text:style-name="P14"/>
      <text:p text:style-name="P16"><text:span text:style-name="T25">The Wide World...</text:span><text:span text:style-name="T26"> a</text:span><text:span text:style-name="T25">nd the </text:span><text:span text:style-name="T27">W</text:span><text:span text:style-name="T25">ider Church</text:span></text:p>
      <text:p text:style-name="P17">We thank You for Your church, the Bride of Christ, the guardian of the Truths of Your Word, and for those saints who have gone before us, but who have left us Your written Word as a reliable and faithful witness to the Risen Word. We thank You for those who loved us and prayed for us to be drawn to the Cross, and for those <text:span text:style-name="T28">in present times</text:span> who have continued to care for us, both in close fellowship, and in distant prayer.</text:p>
      <text:p text:style-name="P18"/>
      <text:p text:style-name="P19">We pray for <text:span text:style-name="T29">this world and for the many people who </text:span><text:span text:style-name="T30">do not know the Truth, </text:span><text:span text:style-name="T29">and yet seek for it in many ways</text:span><text:span text:style-name="T30">. We </text:span><text:span text:style-name="T29">recognise that the enemy below works to isolate them from Your Truth and grace, so we pray that we have the courage to speak, whether boldly or quietly, of the Cross and the Resurrection, of the Lord Jesus Who gave His life for them to be saved</text:span><text:span text:style-name="T30">.</text:span></text:p>
      <text:p text:style-name="P19"/>
      <text:p text:style-name="P20">Ashburton</text:p>
      <text:p text:style-name="P21"><text:span text:style-name="T31">W</text:span><text:span text:style-name="T32">e pray for our </text:span><text:span text:style-name="T33">work</text:span><text:span text:style-name="T34"> </text:span><text:span text:style-name="T31">here at Ashburton, </text:span><text:span text:style-name="T35">and we</text:span><text:span text:style-name="T36"> </text:span><text:span text:style-name="T37">continue</text:span><text:span text:style-name="T38"> </text:span><text:span text:style-name="T33">in</text:span><text:span text:style-name="T36"> pray</text:span><text:span text:style-name="T33">er</text:span><text:span text:style-name="T36"> for</text:span><text:span text:style-name="T39"> </text:span><text:span text:style-name="T37">those in need of Your healing </text:span><text:span text:style-name="T35">and restoration</text:span><text:span text:style-name="T37"> – for </text:span><text:span text:style-name="T35">J</text:span><text:span text:style-name="T39">an, </text:span><text:span text:style-name="T31">Diane, </text:span><text:span text:style-name="T35">for Levi</text:span><text:span text:style-name="T40"> </text:span><text:span text:style-name="T31">and others affected by illness or injury.</text:span></text:p>
      <text:p text:style-name="P22"/>
      <text:p text:style-name="P23">We pray for <text:span text:style-name="T41">Mook and Talia and the family as we prepare to farewell them next week. We pray for Your guidance as they seek new places to serve You and Your church. Grant them</text:span> Your wisdom, <text:span text:style-name="T41">as they</text:span> work to do Your will, <text:span text:style-name="T41">wherever You place them.</text:span></text:p>
      <text:p text:style-name="P23"/>
      <text:p text:style-name="P23">We pray for our <text:span text:style-name="T41">Session, Board and Selection Committee as we adjust to this change, and </text:span><text:span text:style-name="T42">for the presbytery which meets next week,</text:span><text:span text:style-name="T41"> as they continue the search for a new man to bring Your Word and sacraments and to lead the work here</text:span>.</text:p>
      <text:p text:style-name="P23"/>
      <text:p text:style-name="P24"><text:span text:style-name="T43">We thank You for </text:span><text:span text:style-name="T44">Douglas as</text:span><text:span text:style-name="T33"> he preach</text:span><text:span text:style-name="T44">es</text:span><text:span text:style-name="T33"> </text:span><text:span text:style-name="T35">Your Word </text:span><text:span text:style-name="T33">today. </text:span><text:span text:style-name="T35">We thank You for his faithful, effective preaching which enables us to grow in grace</text:span><text:span text:style-name="T44">. </text:span><text:span text:style-name="T35">Help us to be diligent, like the Berean believers, who searched the Scriptures to follow Paul’s preaching in their time.</text:span></text:p>
      <text:p text:style-name="P25"/>
      <text:p text:style-name="P26"><text:span text:style-name="T45">In </text:span><text:span text:style-name="T43">His</text:span><text:span text:style-name="T46"> </text:span><text:span text:style-name="T47">Precious Name </text:span><text:span text:style-name="T48">we pray</text:span><text:span text:style-name="T49">, </text:span><text:span text:style-name="T50">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6-13T20:14:33.736973003</dc:date>
    <meta:editing-duration>PT18H15M25S</meta:editing-duration>
    <meta:editing-cycles>207</meta:editing-cycles>
    <meta:generator>LibreOffice/26.2.4.2$Linux_X86_64 LibreOffice_project/620$Build-2</meta:generator>
    <meta:print-date>2026-06-13T20:12:47.589506541</meta:print-date>
    <meta:printed-by>PDF files</meta:printed-by>
    <meta:document-statistic meta:table-count="0" meta:image-count="0" meta:object-count="0" meta:page-count="1" meta:paragraph-count="20" meta:word-count="551" meta:character-count="2793" meta:non-whitespace-character-count="2261"/>
  </office:meta>
</office:document-meta>
</file>