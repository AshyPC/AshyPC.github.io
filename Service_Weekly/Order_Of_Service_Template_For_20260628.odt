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50e2" officeooo:paragraph-rsid="00520bd6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520bd6"/>
    </style:style>
    <style:style style:name="T1" style:family="text">
      <style:text-properties officeooo:rsid="0051d68a"/>
    </style:style>
    <style:style style:name="T2" style:family="text">
      <style:text-properties officeooo:rsid="0050d310"/>
    </style:style>
    <style:style style:name="T3" style:family="text">
      <style:text-properties fo:font-size="14pt" officeooo:rsid="0042820b" style:font-size-asian="14pt" style:font-size-complex="14pt"/>
    </style:style>
    <style:style style:name="T4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Rev 21:1-4) / <text:span text:style-name="Strong_20_Emphasis">Opening prayer</text:span> (Harrison S)</text:p>
      <text:p text:style-name="P2"><text:span text:style-name="Strong_20_Emphasis">Praise</text:span>: <text:span text:style-name="Emphasis">Love Divine, All Loves Excelling</text:span></text:p>
      <text:p text:style-name="P2"><text:span text:style-name="Strong_20_Emphasis">Bible Reading</text:span>: Exodus 14:1-18 (Seng)</text:p>
      <text:p text:style-name="P2"><text:span text:style-name="Strong_20_Emphasis">Announcements</text:span> (JA)</text:p>
      <text:list text:style-name="L1">
        <text:list-item>
          <text:p text:style-name="P3">Congregational meeting - 5 July - directly after the service</text:p>
        </text:list-item>
        <text:list-item>
          <text:p text:style-name="P3">Working Bee - 11 July - please let Russell know of anything requiring attention.</text:p>
        </text:list-item>
      </text:list>
      <text:p text:style-name="P2"><text:span text:style-name="Strong_20_Emphasis">Praise</text:span>: <text:span text:style-name="Emphasis">Before the Throne of God Above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Psalm 46 (Callum)</text:p>
      <text:p text:style-name="P2"><text:span text:style-name="Strong_20_Emphasis">Praise</text:span>: <text:span text:style-name="Emphasis">Speak O Lord</text:span> (offering)</text:p>
      <text:p text:style-name="P2"><text:span text:style-name="Strong_20_Emphasis">Sermon</text:span>: “PEACE IN A PEACELESS WORLD” (Harrison S)</text:p>
      <text:p text:style-name="P2"><text:span text:style-name="Strong_20_Emphasis">Praise</text:span>: <text:span text:style-name="Emphasis">God is our Strength and Refuge</text:span></text:p>
      <text:p text:style-name="P2"><text:span text:style-name="Strong_20_Emphasis">Benediction</text:span> (Jude 2) (Harrison S)</text:p>
      <text:p text:style-name="P2"><text:span text:style-name="Strong_20_Emphasis">Sermon Outline</text:span></text:p>
      <text:p text:style-name="P2">“PEACE IN A PEACELESS WORLD”   (Psalm 46)</text:p>
      <text:p text:style-name="P2">Introduction</text:p>
      <text:p text:style-name="P2">God is…<text:line-break/>1. A Steadfast Refuge<text:line-break/>2. A Present Deliverer<text:line-break/>3. A Victorious Warrior</text:p>
      <text:p text:style-name="P2">Conclusion</text:p>
      <text:p text:style-name="P4"><text:span text:style-name="Strong_20_Emphasis">Call to Worship</text:span> <text:span text:style-name="T1">(1 Chron 16:8-9) </text:span><text:span text:style-name="T2">&amp;</text:span> <text:span text:style-name="Strong_20_Emphasis">Opening prayer</text:span> </text:p>
      <text:p text:style-name="Opening_5f_Verse">[8] Give praise to the Lord, proclaim his name; make known among the nations what he has done. </text:p>
      <text:p text:style-name="Opening_5f_Verse">[9] Sing to him, sing praise to him; tell of all his wonderful acts. </text:p>
      <text:p text:style-name="P5">Let us pray…</text:p>
      <text:p text:style-name="P5"/>
      <text:p text:style-name="P6"><text:span text:style-name="T3">[</text:span><text:span text:style-name="T4">Rej! 47</text:span><text:span text:style-name="T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58340"/>
    </style:style>
    <style:style style:name="MT3" style:family="text">
      <style:text-properties officeooo:rsid="00495328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48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8</text:span><text:span text:style-name="MT3">th</text:span> <text:span text:style-name="MT2">June</text:span><text:span text:style-name="MT4"> 202</text:span><text:span text:style-name="MT2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6-27T18:20:09.137727392</dc:date>
    <meta:editing-duration>PT6H35M52S</meta:editing-duration>
    <meta:editing-cycles>49</meta:editing-cycles>
    <meta:generator>LibreOffice/26.2.4.2$Linux_X86_64 LibreOffice_project/620$Build-2</meta:generator>
    <meta:print-date>2024-02-03T21:06:33.278074986</meta:print-date>
    <meta:document-statistic meta:table-count="0" meta:image-count="0" meta:object-count="0" meta:page-count="2" meta:paragraph-count="24" meta:word-count="172" meta:character-count="979" meta:non-whitespace-character-count="827"/>
  </office:meta>
</office:document-meta>
</file>