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f36239" officeooo:paragraph-rsid="01f36239"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paragraph-properties style:writing-mode="lr-tb"/>
      <style:text-properties fo:font-size="13pt" officeooo:paragraph-rsid="01db7a8a" style:font-size-asian="13pt" style:font-size-complex="13pt"/>
    </style:style>
    <style:style style:name="P10"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1" style:family="paragraph" style:parent-style-name="Preformatted_20_Text">
      <style:paragraph-properties style:writing-mode="lr-tb"/>
      <style:text-properties fo:font-size="13pt" officeooo:rsid="01e115a9" officeooo:paragraph-rsid="01ee2e52" style:font-size-asian="13pt" style:font-size-complex="13pt"/>
    </style:style>
    <style:style style:name="P12" style:family="paragraph" style:parent-style-name="Preformatted_20_Text">
      <style:paragraph-properties style:writing-mode="lr-tb"/>
      <style:text-properties style:font-name="Liberation Sans" fo:font-size="13pt" fo:font-style="normal" style:text-underline-style="none" officeooo:rsid="01f3dd72" officeooo:paragraph-rsid="01ee2e52" style:font-name-asian="Nimbus Mono L" style:font-size-asian="13pt" style:font-style-asian="normal" style:font-name-complex="Liberation Mono"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d74f08" officeooo:paragraph-rsid="01ee2e52" style:font-name-asian="Nimbus Mono L" style:font-size-asian="13pt" style:font-style-asian="normal" style:font-name-complex="Liberation Mono" style:font-size-complex="13pt" style:font-style-complex="normal"/>
    </style:style>
    <style:style style:name="P14" style:family="paragraph" style:parent-style-name="Preformatted_20_Text">
      <style:paragraph-properties style:writing-mode="lr-tb"/>
      <style:text-properties style:font-name="Liberation Sans" fo:font-size="13pt" fo:font-style="normal" style:text-underline-style="none" officeooo:rsid="01ee2e52" officeooo:paragraph-rsid="01ee2e52" style:font-name-asian="Nimbus Mono L" style:font-size-asian="13pt" style:font-style-asian="normal" style:font-name-complex="Liberation Mono" style:font-size-complex="13pt" style:font-style-complex="normal"/>
    </style:style>
    <style:style style:name="P15"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6"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20" style:family="paragraph" style:parent-style-name="Preformatted_20_Text">
      <style:paragraph-properties style:writing-mode="lr-tb"/>
      <style:text-properties fo:font-size="13pt" officeooo:paragraph-rsid="01efb23b" style:font-size-asian="13pt" style:font-size-complex="13pt"/>
    </style:style>
    <style:style style:name="P21" style:family="paragraph" style:parent-style-name="Preformatted_20_Text">
      <style:paragraph-properties style:writing-mode="lr-tb"/>
      <style:text-properties style:font-name="Liberation Sans" fo:font-size="13pt" fo:font-style="normal" style:text-underline-style="none" officeooo:rsid="01d92df6" officeooo:paragraph-rsid="01ef3a07" fo:background-color="transparent" style:font-name-asian="Nimbus Mono L" style:font-size-asian="13pt" style:font-style-asian="normal" style:font-name-complex="Liberation Mono" style:font-size-complex="13pt" style:font-style-complex="normal"/>
    </style:style>
    <style:style style:name="P22" style:family="paragraph" style:parent-style-name="Preformatted_20_Text">
      <style:text-properties fo:font-size="13pt" officeooo:paragraph-rsid="01dd3a06" style:font-size-asian="13pt" style:font-size-complex="13pt"/>
    </style:style>
    <style:style style:name="P23"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4" style:family="paragraph" style:parent-style-name="Preformatted_20_Text">
      <style:paragraph-properties style:writing-mode="lr-tb"/>
      <style:text-properties fo:font-size="13pt" officeooo:paragraph-rsid="01dd3a06" style:font-size-asian="13pt" style:font-size-complex="13pt"/>
    </style:style>
    <style:style style:name="P25"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6" style:family="paragraph" style:parent-style-name="Preformatted_20_Text">
      <style:text-properties fo:font-size="13pt" officeooo:paragraph-rsid="01c26751" style:font-size-asian="13pt" style:font-size-complex="13pt"/>
    </style:style>
    <style:style style:name="P27" style:family="paragraph" style:parent-style-name="Preformatted_20_Text">
      <style:text-properties style:font-name="Liberation Sans" fo:font-size="13pt" fo:font-style="normal" style:text-underline-style="none" officeooo:rsid="00083d4b" officeooo:paragraph-rsid="01c26751" fo:background-color="transparent" style:font-size-asian="13pt" style:font-style-asian="normal" style:font-size-complex="13pt" style:font-style-complex="normal"/>
    </style:style>
    <style:style style:name="P28" style:family="paragraph" style:parent-style-name="Preformatted_20_Text">
      <style:text-properties style:font-name="Liberation Sans" fo:font-size="13pt" fo:font-style="normal" style:text-underline-style="none" officeooo:rsid="01f84772" officeooo:paragraph-rsid="01f84772" fo:background-color="transparent" style:font-size-asian="13pt" style:font-style-asian="normal" style:font-size-complex="13pt" style:font-style-complex="normal"/>
    </style:style>
    <style:style style:name="P29"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30"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P31" style:family="paragraph" style:parent-style-name="Text_20_body">
      <loext:graphic-properties draw:fill-hatch-name="hatch"/>
      <style:paragraph-properties fo:margin-top="0.101cm" fo:margin-bottom="0.499cm" style:contextual-spacing="false" fo:line-height="115%" fo:text-align="center" style:justify-single-word="false" fo:break-before="page"/>
      <style:text-properties fo:font-size="14pt" officeooo:rsid="0048b50d" officeooo:paragraph-rsid="019a38b8" style:font-size-asian="14pt" style:font-size-complex="14pt" loext:padding="0cm" loext:border="none"/>
    </style:style>
    <style:style style:name="P32" style:family="paragraph" style:parent-style-name="Text_20_body">
      <loext:graphic-properties draw:fill-hatch-name="hatch"/>
      <style:paragraph-properties fo:margin-top="0.101cm" fo:margin-bottom="0.499cm" style:contextual-spacing="false" fo:line-height="115%" fo:text-align="left" style:justify-single-word="false"/>
      <style:text-properties fo:font-size="14pt" officeooo:rsid="0048b50d" officeooo:paragraph-rsid="019a38b8" style:font-size-asian="14pt" style:font-size-complex="14pt" loext:padding="0cm" loext:border="none"/>
    </style:style>
    <style:style style:name="P33" style:family="paragraph" style:parent-style-name="Text_20_body">
      <loext:graphic-properties draw:fill-hatch-name="hatch"/>
      <style:paragraph-properties fo:margin-top="0.101cm" fo:margin-bottom="0.499cm" style:contextual-spacing="false" fo:line-height="115%" fo:text-align="left" style:justify-single-word="false"/>
      <style:text-properties fo:font-size="14pt" officeooo:rsid="01f1c691" officeooo:paragraph-rsid="01f1c691" style:font-size-asian="14pt" style:font-size-complex="14pt" loext:padding="0cm" loext:border="none"/>
    </style:style>
    <style:style style:name="T1" style:family="text">
      <style:text-properties style:font-name="Liberation Sans" fo:font-size="16pt" fo:font-weight="bold" officeooo:rsid="01f36239"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f36239" style:font-size-asian="16pt" style:font-weight-asian="bold" style:font-size-complex="16pt" style:font-weight-complex="bold"/>
    </style:style>
    <style:style style:name="T7" style:family="text">
      <style:text-properties officeooo:rsid="01f3dd72"/>
    </style:style>
    <style:style style:name="T8"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f3dd72"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6" style:family="text">
      <style:text-properties style:font-name="Liberation Sans" fo:font-style="normal" style:text-underline-style="none" style:font-name-asian="Nimbus Mono L" style:font-style-asian="normal" style:font-name-complex="Liberation Mono" style:font-style-complex="normal"/>
    </style:style>
    <style:style style:name="T17" style:family="text">
      <style:text-properties officeooo:rsid="01ee2e52"/>
    </style:style>
    <style:style style:name="T18" style:family="text">
      <style:text-properties officeooo:rsid="01f4e9ec"/>
    </style:style>
    <style:style style:name="T19" style:family="text">
      <style:text-properties officeooo:rsid="01fb449a"/>
    </style:style>
    <style:style style:name="T20"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f4e9ec"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23" style:family="text">
      <style:text-properties fo:font-weight="bold" style:font-weight-asian="bold" style:font-weight-complex="bold"/>
    </style:style>
    <style:style style:name="T24" style:family="text">
      <style:text-properties officeooo:rsid="01caa47b"/>
    </style:style>
    <style:style style:name="T25" style:family="text">
      <style:text-properties officeooo:rsid="01d74f08"/>
    </style:style>
    <style:style style:name="T26" style:family="text">
      <style:text-properties officeooo:rsid="01db7a8a"/>
    </style:style>
    <style:style style:name="T27" style:family="text">
      <style:text-properties officeooo:rsid="01f65011"/>
    </style:style>
    <style:style style:name="T28" style:family="text">
      <style:text-properties officeooo:rsid="01ef3a07"/>
    </style:style>
    <style:style style:name="T29" style:family="text">
      <style:text-properties officeooo:rsid="01f84772"/>
    </style:style>
    <style:style style:name="T30"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f84772"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fabb93"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3c55a1" fo:background-color="transparent" loext:char-shading-value="0" style:font-style-asian="normal" style:font-style-complex="normal"/>
    </style:style>
    <style:style style:name="T48" style:family="text">
      <style:text-properties style:font-name="Liberation Sans" fo:font-style="normal" style:text-underline-style="none" officeooo:rsid="00083d4b" fo:background-color="transparent" loext:char-shading-value="0" style:font-style-asian="normal" style:font-style-complex="normal"/>
    </style:style>
    <style:style style:name="T49" style:family="text">
      <style:text-properties officeooo:rsid="01f92191"/>
    </style:style>
    <style:style style:name="T50"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26</text:span><text:span text:style-name="T2">th</text:span><text:span text:style-name="T3"> </text:span><text:span text:style-name="T1">April</text:span><text:span text:style-name="T4"> 20</text:span><text:span text:style-name="T5">2</text:span><text:span text:style-name="T6">6</text:span></text:p>
      <text:p text:style-name="P3">John 8:32, 36</text:p>
      <text:p text:style-name="P4">Then you wil<text:span text:style-name="T7">l</text:span> know the truth, and the Truth will set you free...</text:p>
      <text:p text:style-name="P5">So if the Son sets you free, you will be free indeed.</text:p>
      <text:p text:style-name="P6"/>
      <text:p text:style-name="P7">Let us pray…</text:p>
      <text:p text:style-name="P7"/>
      <text:p text:style-name="P8">Thanks to God</text:p>
      <text:p text:style-name="P9"><text:span text:style-name="T8">O </text:span><text:span text:style-name="T9">L</text:span><text:span text:style-name="T10">o</text:span><text:span text:style-name="T9">r</text:span><text:span text:style-name="T10">d,</text:span><text:span text:style-name="T11"> </text:span><text:span text:style-name="T12">we </text:span><text:span text:style-name="T13">thank You </text:span><text:span text:style-name="T14">this weekend for Australia, which was formed because the people of the colonies agreed to unite as a nation by “humbly relying on the blessing of Almighty God”</text:span><text:span text:style-name="T15">.</text:span></text:p>
      <text:p text:style-name="P10"/>
      <text:p text:style-name="P11"><text:span text:style-name="T16">We </text:span><text:span text:style-name="T14">thank You for Your mercies as our nation yesterday remembered those who have served in times of war. We pray for those who returned, wounded and battle-scarred, as well as those who did not return, but gave their lives to preserve the freedoms we enjoy today.</text:span></text:p>
      <text:p text:style-name="P12"/>
      <text:p text:style-name="P13"><text:span text:style-name="T17">We </text:span><text:span text:style-name="T7">thank You also for those who became prisoners of war, and we especially recall from within our own congregation Eric Edwards, captured at Tobruk in 1941. </text:span><text:span text:style-name="T18">We remember and give You thanks for others connected with this congregation: Wally and Tom French, Jim Gleeson, </text:span><text:span text:style-name="T19">and others who served in various theatres of conflict</text:span><text:span text:style-name="T18">.</text:span></text:p>
      <text:p text:style-name="P14"/>
      <text:p text:style-name="P11"><text:span text:style-name="T15">We thank You </text:span><text:span text:style-name="T20">that, </text:span><text:span text:style-name="T14">because of the sacrifice </text:span><text:span text:style-name="T21">of so many</text:span><text:span text:style-name="T14">, we were free to hear the good news of the gospel, and respond to the leading of the Holy Spirit. </text:span><text:span text:style-name="T21">W</text:span><text:span text:style-name="T20">e </text:span><text:span text:style-name="T21">ac</text:span><text:span text:style-name="T14">know</text:span><text:span text:style-name="T21">ledge that</text:span><text:span text:style-name="T14"> we </text:span><text:span text:style-name="T20">have been </text:span><text:span text:style-name="T16">forgiven </text:span><text:span text:style-name="T22">by Your grace and mercy alone. </text:span><text:span text:style-name="T14">We thank You for setting us </text:span><text:span text:style-name="T16">free </text:span><text:span text:style-name="T14">indeed </text:span><text:span text:style-name="T22">from sin – </text:span><text:span text:style-name="T14">the greatest freedom we can know in this life</text:span><text:span text:style-name="T20">.</text:span></text:p>
      <text:p text:style-name="P15"/>
      <text:p text:style-name="P16"><text:span text:style-name="T23">The Church</text:span></text:p>
      <text:p text:style-name="P17"><text:span text:style-name="T24">W</text:span><text:span text:style-name="T25">e </text:span><text:span text:style-name="T26">pray</text:span><text:span text:style-name="T25"> for </text:span><text:span text:style-name="T18">Your church, the Body of Christ, and for the task You have entrusted to us, to be ambassadors </text:span><text:span text:style-name="T19">for</text:span><text:span text:style-name="T18"> Jesus, declaring His victory at the Cross and in the Resurrection.</text:span></text:p>
      <text:p text:style-name="P17"/>
      <text:p text:style-name="P18">We pray for <text:span text:style-name="T27">boldness</text:span><text:span text:style-name="T28">, </text:span><text:span text:style-name="T27">to declare</text:span><text:span text:style-name="T28"> the Truth </text:span><text:span text:style-name="T27">that death is not the end, but that because Jesus lives, there is a sure hope – we can face tomorrow</text:span><text:span text:style-name="T28">. We </text:span><text:span text:style-name="T27">thank You that because sin has been judged and defeated, </text:span><text:span text:style-name="T29">those </text:span><text:span text:style-name="T27">we </text:span><text:span text:style-name="T29">speak to</text:span><text:span text:style-name="T27"> can look to You for a hope and a future.</text:span></text:p>
      <text:p text:style-name="P18"/>
      <text:p text:style-name="P19">Ashburton</text:p>
      <text:p text:style-name="P20"><text:span text:style-name="T30">W</text:span><text:span text:style-name="T31">e pray for our </text:span><text:span text:style-name="T32">work</text:span><text:span text:style-name="T33"> </text:span><text:span text:style-name="T30">here at Ashburton, </text:span><text:span text:style-name="T33">a</text:span><text:span text:style-name="T34">nd give thanks for the Assessor Elders appointed by Presbytery</text:span><text:span text:style-name="T35">. </text:span><text:span text:style-name="T34">We pray for the Session to know Your wisdom as they minister to the needs of the congregation, that we may continue to grow in faith and in numbers as You bring new people to us. Strengthen us as we serve one another in love and good deeds.</text:span></text:p>
      <text:p text:style-name="P21"><text:span text:style-name="T36"/></text:p>
      <text:p text:style-name="P22"><text:span text:style-name="T37">We </text:span><text:span text:style-name="T38">continue</text:span><text:span text:style-name="T39"> </text:span><text:span text:style-name="T32">in</text:span><text:span text:style-name="T37"> pray</text:span><text:span text:style-name="T32">er</text:span><text:span text:style-name="T37"> for</text:span><text:span text:style-name="T40"> </text:span><text:span text:style-name="T34">Jan and all those involved in preparing for the memorial service</text:span><text:span text:style-name="T30">. </text:span><text:span text:style-name="T34">We thank You that Allan’s passing to glory is an occasion for thanks, and not only for grieving at his absence from us.</text:span></text:p>
      <text:p text:style-name="P23"/>
      <text:p text:style-name="P24"><text:span text:style-name="T41">We thank You for </text:span><text:span text:style-name="T32">Your Word, and for </text:span><text:span text:style-name="T35">Douglas as</text:span><text:span text:style-name="T32"> he preach</text:span><text:span text:style-name="T35">es</text:span><text:span text:style-name="T32"> today. </text:span><text:span text:style-name="T35">We pray that </text:span><text:span text:style-name="T34">his words will bring true light to our understanding so that we may grow in godliness as a congregation, manif</text:span><text:span text:style-name="T42">e</text:span><text:span text:style-name="T34">sting Your love to each other and to those beyond these four walls</text:span><text:span text:style-name="T35">.</text:span></text:p>
      <text:p text:style-name="P25"/>
      <text:p text:style-name="P26"><text:span text:style-name="T43">In </text:span><text:span text:style-name="T41">His</text:span><text:span text:style-name="T44"> </text:span><text:span text:style-name="T45">Precious Name </text:span><text:span text:style-name="T46">we pray</text:span><text:span text:style-name="T47">, </text:span><text:span text:style-name="T48">Amen.</text:span></text:p>
      <text:p text:style-name="P27"/>
      <text:p text:style-name="P27"/>
      <text:p text:style-name="P27"><text:soft-page-break/></text:p>
      <text:p text:style-name="P28">Before we come to our second reading for today, let us recite the words of the ANZAC <text:s/>memorial, and as we do, recall that the closing words are from a prayer to the Lord God of Hosts, a reminder that we are truly in <text:span text:style-name="T49">G</text:span>od’s hands, even as we remember the sacrifices of our armed forces. </text:p>
      <text:p text:style-name="P27"/>
      <text:p text:style-name="P29">They shall not grow old, as we that are left grow old.</text:p>
      <text:p text:style-name="P29">Age shall not weary them, nor the years condemn.</text:p>
      <text:p text:style-name="P29">At the going <text:span text:style-name="T50">d</text:span>own of the sun, and in the morning, </text:p>
      <text:p text:style-name="P29">We WILL remember them.</text:p>
      <text:p text:style-name="P30">Lest We Forget</text:p>
      <text:p text:style-name="P30"/>
      <text:p text:style-name="P31"/>
      <text:p text:style-name="P32">Lord God of Hosts, be with us yet, Lest we forget—lest we forget!</text:p>
      <text:p text:style-name="P32">it is evident just what we are being reminded to remember; namely, the sacrifices of our soldiers, who died fighting an enemy on the other side of the world in order, we are told, to preserve our freedoms.</text:p>
      <text:p text:style-name="P33">Then you wil know the truth, and the Truth will set you free John 8:32</text:p>
      <text:p text:style-name="P33">The people of the various colonies, …humbly relying on the blessing of Almighty God, agreed to unite into a nation</text:p>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4-25T21:50:33.269284904</dc:date>
    <meta:editing-duration>PT18H7M3S</meta:editing-duration>
    <meta:editing-cycles>207</meta:editing-cycles>
    <meta:generator>LibreOffice/26.2.2.2$Linux_X86_64 LibreOffice_project/620$Build-2</meta:generator>
    <meta:print-date>2026-04-25T21:48:24.079061628</meta:print-date>
    <meta:printed-by>PDF files</meta:printed-by>
    <meta:document-statistic meta:table-count="0" meta:image-count="0" meta:object-count="0" meta:page-count="3" meta:paragraph-count="29" meta:word-count="672" meta:character-count="3528" meta:non-whitespace-character-count="2881"/>
  </office:meta>
</office:document-meta>
</file>