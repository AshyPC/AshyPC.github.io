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f519d6"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118ab"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118ab"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ee2e52"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paragraph-properties style:writing-mode="lr-tb"/>
      <style:text-properties style:font-name="Liberation Sans" fo:font-size="13pt" fo:font-style="normal" style:text-underline-style="none" officeooo:rsid="01cc8e23" officeooo:paragraph-rsid="01ef3a0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style:writing-mode="lr-tb"/>
      <style:text-properties fo:font-size="13pt" officeooo:paragraph-rsid="01dd3a06" style:font-size-asian="13pt" style:font-size-complex="13pt"/>
    </style:style>
    <style:style style:name="P21"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c26751" style:font-size-asian="13pt" style:font-size-complex="13pt"/>
    </style:style>
    <style:style style:name="P23" style:family="paragraph" style:parent-style-name="Preformatted_20_Text">
      <style:text-properties fo:font-size="14pt" officeooo:rsid="0048b50d" officeooo:paragraph-rsid="01efb23b" style:font-size-asian="14pt" style:font-size-complex="14pt" loext:padding="0cm" loext:border="none"/>
    </style:style>
    <style:style style:name="T1"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ca5f48" style:font-size-asian="16pt" style:font-weight-asian="bold" style:font-size-complex="16pt" style:font-weight-complex="bold"/>
    </style:style>
    <style:style style:name="T7" style:family="text">
      <style:text-properties style:font-name="Liberation Sans" fo:font-style="normal" style:text-underline-style="none" officeooo:rsid="01f118ab"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5" style:family="text">
      <style:text-properties style:font-name="Liberation Sans" fo:font-style="normal" style:text-underline-style="none"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7" style:family="text">
      <style:text-properties officeooo:rsid="01e15a69"/>
    </style:style>
    <style:style style:name="T18" style:family="text">
      <style:text-properties officeooo:rsid="01ee2e52"/>
    </style:style>
    <style:style style:name="T19" style:family="text">
      <style:text-properties officeooo:rsid="01f118ab"/>
    </style:style>
    <style:style style:name="T20" style:family="text">
      <style:text-properties officeooo:rsid="01e115a9"/>
    </style:style>
    <style:style style:name="T21" style:family="text">
      <style:text-properties officeooo:rsid="01f3926c"/>
    </style:style>
    <style:style style:name="T22" style:family="text">
      <style:text-properties officeooo:rsid="01f1f3ad"/>
    </style:style>
    <style:style style:name="T23" style:family="text">
      <style:text-properties fo:font-weight="bold" style:font-weight-asian="bold" style:font-weight-complex="bold"/>
    </style:style>
    <style:style style:name="T24" style:family="text">
      <style:text-properties fo:font-weight="bold" officeooo:rsid="000dd66a" style:font-weight-asian="bold" style:font-weight-complex="bold"/>
    </style:style>
    <style:style style:name="T25" style:family="text">
      <style:text-properties fo:font-weight="bold" officeooo:rsid="0160cefc" style:font-weight-asian="bold" style:font-weight-complex="bold"/>
    </style:style>
    <style:style style:name="T26" style:family="text">
      <style:text-properties officeooo:rsid="01caa47b"/>
    </style:style>
    <style:style style:name="T27" style:family="text">
      <style:text-properties officeooo:rsid="01d74f08"/>
    </style:style>
    <style:style style:name="T28" style:family="text">
      <style:text-properties officeooo:rsid="01db7a8a"/>
    </style:style>
    <style:style style:name="T29" style:family="text">
      <style:text-properties officeooo:rsid="01f29271"/>
    </style:style>
    <style:style style:name="T30" style:family="text">
      <style:text-properties officeooo:rsid="01ef3a07"/>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f29271"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f3926c"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3c55a1" fo:background-color="transparent" loext:char-shading-value="0" style:font-style-asian="normal" style:font-style-complex="normal"/>
    </style:style>
    <style:style style:name="T44"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7</text:span><text:span text:style-name="T2">th</text:span><text:span text:style-name="T3"> </text:span><text:span text:style-name="T1">September</text:span><text:span text:style-name="T4"> 20</text:span><text:span text:style-name="T5">2</text:span><text:span text:style-name="T6">5</text:span></text:p>
      <text:p text:style-name="P3">Psalm 13:5-6</text:p>
      <text:p text:style-name="P4">[5] But I have trusted in your steadfast love; my heart shall rejoice in your salvation.</text:p>
      <text:p text:style-name="P5">[6] I will sing to the Lord, because he has dealt bountifully with me.</text:p>
      <text:p text:style-name="P6"/>
      <text:p text:style-name="P7">Let us pray…</text:p>
      <text:p text:style-name="P7"/>
      <text:p text:style-name="P8">Thanks to God</text:p>
      <text:p text:style-name="P9"><text:span text:style-name="T7">Father GOD</text:span><text:span text:style-name="T8">,</text:span><text:span text:style-name="T9"> </text:span><text:span text:style-name="T10">we </text:span><text:span text:style-name="T11">thank You that </text:span><text:span text:style-name="T12">You </text:span><text:span text:style-name="T7">have dealt bountifully with us, as individual believers, and as a congregation called together to worship You in this place</text:span><text:span text:style-name="T13">.</text:span></text:p>
      <text:p text:style-name="P10"/>
      <text:p text:style-name="P11"><text:span text:style-name="T13">We thank You </text:span><text:span text:style-name="T14">that we have been </text:span><text:span text:style-name="T15">forgiven </text:span><text:span text:style-name="T16">by Your grace and mercy alone</text:span><text:span text:style-name="T15">, and </text:span><text:span text:style-name="T16">have been </text:span><text:span text:style-name="T15">set free </text:span><text:span text:style-name="T16">from sin</text:span><text:span text:style-name="T14">.</text:span></text:p>
      <text:p text:style-name="P12"/>
      <text:p text:style-name="P13"><text:span text:style-name="T17">W</text:span>e thank You that <text:span text:style-name="T18">we </text:span><text:span text:style-name="T19">can rejoice in</text:span><text:span text:style-name="T18"> the Cross and </text:span><text:span text:style-name="T19">the </text:span><text:span text:style-name="T18">Resurrection, which secured our eternal salvation</text:span><text:span text:style-name="T20">. </text:span><text:span text:style-name="T19">We know that we could not do anything to save ourselves, and we must trust entirely in Your steadfast love towards us. We thank You for the New Life which Jesus impart</text:span><text:span text:style-name="T21">ed</text:span><text:span text:style-name="T19"> to us when we turned to You and confessed our sin.</text:span></text:p>
      <text:p text:style-name="P13"/>
      <text:p text:style-name="P13"><text:span text:style-name="T18">We thank You for the Holy Spirit </text:span><text:span text:style-name="T19">Who is </text:span><text:span text:style-name="T18">with us daily, enabl</text:span><text:span text:style-name="T19">ing</text:span><text:span text:style-name="T18"> us to </text:span><text:span text:style-name="T19">make sense of the events in this world which swirl around us, </text:span><text:span text:style-name="T22">beyond our control</text:span><text:span text:style-name="T19">. We thank You that He shows us the Way of </text:span><text:span text:style-name="T22">eternal </text:span><text:span text:style-name="T19">Life, as He sanctifies us progressively in our daily walk.</text:span></text:p>
      <text:p text:style-name="P12"/>
      <text:p text:style-name="P14"><text:span text:style-name="T23">The Wide World...</text:span><text:span text:style-name="T24"> a</text:span><text:span text:style-name="T23">nd the </text:span><text:span text:style-name="T25">W</text:span><text:span text:style-name="T23">ider Church</text:span></text:p>
      <text:p text:style-name="P15"><text:span text:style-name="T26">W</text:span><text:span text:style-name="T27">e </text:span><text:span text:style-name="T28">pray</text:span><text:span text:style-name="T27"> for this </text:span><text:span text:style-name="T26">world </text:span><text:span text:style-name="T27">where </text:span><text:span text:style-name="T22">war continues in the Middle East and Ukraine, and we are surprised by strange events, but You remain in control, bringing about Your purposes, even from the bad things we see happening. We pray for Your people, in churches as well as in hidden communities suffering persecution, or working to bring relief to refugees, or in other parts of the world suffering from the results of the</text:span><text:span text:style-name="T21">se</text:span><text:span text:style-name="T22"> conflicts.</text:span></text:p>
      <text:p text:style-name="P15"/>
      <text:p text:style-name="P16">We pray for <text:span text:style-name="T29">our nation, enjoying relative peace, and give You thanks that we can meet openly and freely</text:span><text:span text:style-name="T30">. </text:span><text:span text:style-name="T29">We also recognise that there are those who express hatred towards Jewish people and towards Your church. We pray for those enemies to turn away from hatred, and we pray that they would hear the Good News, and turn back to You.</text:span></text:p>
      <text:p text:style-name="P16"/>
      <text:p text:style-name="P17">Ashburton</text:p>
      <text:p text:style-name="P18"><text:span text:style-name="T31">W</text:span><text:span text:style-name="T32">e pray for our </text:span><text:span text:style-name="T33">work</text:span><text:span text:style-name="T34"> </text:span><text:span text:style-name="T31">at Ashburton, </text:span><text:span text:style-name="T34">as we </text:span><text:span text:style-name="T35">face </text:span><text:span text:style-name="T36">our</text:span><text:span text:style-name="T35"> new situation, trusting in Your purposes for us here. We pray for the Session which meets next week, that You grant wisdom and strength as Douglas, Mook and I seek to follow Your leading. We thank You that in Your providence, the timing of these changes will enable Mook to pursue Your calling on his life in a new way, and that we continue to support him and Talia and the family as they </text:span><text:span text:style-name="T36">trust You for their future</text:span><text:span text:style-name="T35">.</text:span></text:p>
      <text:p text:style-name="P19"/>
      <text:p text:style-name="P20"><text:span text:style-name="T37">We thank You for </text:span><text:span text:style-name="T35">the support we receive from the wider denomination, from the Presbytery in particular, and we give thanks for </text:span><text:span text:style-name="T33">Your Word, and for </text:span><text:span text:style-name="T35">Alan </text:span><text:span text:style-name="T38">as</text:span><text:span text:style-name="T33"> he preach</text:span><text:span text:style-name="T38">es</text:span><text:span text:style-name="T33"> today.</text:span><text:span text:style-name="T38"> </text:span><text:span text:style-name="T35">Help us to take it in, and apply what we hear to our everyday walk and work this week.</text:span></text:p>
      <text:p text:style-name="P21"/>
      <text:p text:style-name="P22"><text:span text:style-name="T39">In </text:span><text:span text:style-name="T35">Jesus</text:span><text:span text:style-name="T40"> </text:span><text:span text:style-name="T41">Precious Name </text:span><text:span text:style-name="T42">we pray</text:span><text:span text:style-name="T43">, </text:span><text:span text:style-name="T44">Amen.</text:span></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3-21T20:48:28.972901698</dc:date>
    <meta:editing-duration>PT18H25M58S</meta:editing-duration>
    <meta:editing-cycles>206</meta:editing-cycles>
    <meta:generator>LibreOffice/25.8.5.2$Linux_X86_64 LibreOffice_project/580$Build-2</meta:generator>
    <meta:print-date>2026-03-21T20:31:17.536245736</meta:print-date>
    <meta:document-statistic meta:table-count="0" meta:image-count="0" meta:object-count="0" meta:page-count="1" meta:paragraph-count="18" meta:word-count="498" meta:character-count="2659" meta:non-whitespace-character-count="2179"/>
  </office:meta>
</office:document-meta>
</file>