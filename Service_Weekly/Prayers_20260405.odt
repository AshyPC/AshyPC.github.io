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f2a99b" officeooo:paragraph-rsid="01f2a99b"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4"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e9b30f" officeooo:paragraph-rsid="01f3430c"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paragraph-properties style:writing-mode="lr-tb"/>
      <style:text-properties style:font-name="Liberation Sans" fo:font-size="13pt" fo:font-style="normal" style:text-underline-style="none" officeooo:rsid="01d92df6" officeooo:paragraph-rsid="01ef3a0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dd3a06" style:font-size-asian="13pt" style:font-size-complex="13pt"/>
    </style:style>
    <style:style style:name="P22"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paragraph-properties style:writing-mode="lr-tb"/>
      <style:text-properties fo:font-size="13pt" officeooo:paragraph-rsid="01dd3a06" style:font-size-asian="13pt" style:font-size-complex="13pt"/>
    </style:style>
    <style:style style:name="P24"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text-properties fo:font-size="13pt" officeooo:paragraph-rsid="01c26751" style:font-size-asian="13pt" style:font-size-complex="13pt"/>
    </style:style>
    <style:style style:name="P26" style:family="paragraph" style:parent-style-name="Preformatted_20_Text">
      <style:paragraph-properties fo:break-before="page"/>
      <style:text-properties style:font-name="Liberation Sans" fo:font-size="13pt" fo:font-style="normal" style:text-underline-style="none" officeooo:rsid="00083d4b" officeooo:paragraph-rsid="01c26751" fo:background-color="transparent" style:font-size-asian="13pt" style:font-style-asian="normal" style:font-size-complex="13pt" style:font-style-complex="normal"/>
    </style:style>
    <style:style style:name="P27" style:family="paragraph" style:parent-style-name="Preformatted_20_Text">
      <style:text-properties style:font-name="Liberation Sans" fo:font-size="13pt" fo:font-style="normal" style:text-underline-style="none" officeooo:rsid="01efb23b" officeooo:paragraph-rsid="01efb23b" fo:background-color="transparent" style:font-size-asian="13pt" style:font-style-asian="normal" style:font-size-complex="13pt" style:font-style-complex="normal"/>
    </style:style>
    <style:style style:name="P28" style:family="paragraph" style:parent-style-name="Preformatted_20_Text">
      <style:text-properties style:font-name="Liberation Sans" fo:font-size="13pt" fo:font-style="normal" style:text-underline-style="none" officeooo:rsid="01ef3a07" officeooo:paragraph-rsid="01ef3a07" fo:background-color="transparent" style:font-size-asian="13pt" style:font-style-asian="normal" style:font-size-complex="13pt" style:font-style-complex="normal"/>
    </style:style>
    <style:style style:name="P29" style:family="paragraph" style:parent-style-name="Preformatted_20_Text">
      <style:text-properties style:font-name="Liberation Sans" fo:font-size="13pt" fo:font-style="normal" style:text-underline-style="none" officeooo:rsid="00083d4b" officeooo:paragraph-rsid="01c26751" fo:background-color="transparent" style:font-size-asian="13pt" style:font-style-asian="normal" style:font-size-complex="13pt" style:font-style-complex="normal"/>
    </style:style>
    <style:style style:name="P3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3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32"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33"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34"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f2a99b"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2a99b" style:font-size-asian="16pt" style:font-weight-asian="bold" style:font-size-complex="16pt" style:font-weight-complex="bold"/>
    </style:style>
    <style:style style:name="T7"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f2a99b"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5" style:family="text">
      <style:text-properties style:font-name="Liberation Sans" fo:font-style="normal" style:text-underline-style="none"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e15a69" style:font-style-asian="normal" style:font-style-complex="normal"/>
    </style:style>
    <style:style style:name="T19" style:family="text">
      <style:text-properties style:font-name="Liberation Sans" fo:font-style="normal" style:text-underline-style="none" officeooo:rsid="01d74f08" style:font-style-asian="normal" style:font-style-complex="normal"/>
    </style:style>
    <style:style style:name="T20" style:family="text">
      <style:text-properties style:font-name="Liberation Sans" fo:font-style="normal" style:text-underline-style="none" officeooo:rsid="01ee2e52" style:font-style-asian="normal" style:font-style-complex="normal"/>
    </style:style>
    <style:style style:name="T21" style:family="text">
      <style:text-properties style:font-name="Liberation Sans" fo:font-style="normal" style:text-underline-style="none" officeooo:rsid="01f2a99b" style:font-style-asian="normal" style:font-style-complex="normal"/>
    </style:style>
    <style:style style:name="T22" style:family="text">
      <style:text-properties style:font-name="Liberation Sans" fo:font-style="normal" style:text-underline-style="none" style:font-style-asian="normal" style:font-style-complex="normal"/>
    </style:style>
    <style:style style:name="T23" style:family="text">
      <style:text-properties officeooo:rsid="01ee2e52"/>
    </style:style>
    <style:style style:name="T24" style:family="text">
      <style:text-properties officeooo:rsid="01ef3a07"/>
    </style:style>
    <style:style style:name="T25" style:family="text">
      <style:text-properties fo:font-weight="bold" style:font-weight-asian="bold" style:font-weight-complex="bold"/>
    </style:style>
    <style:style style:name="T26" style:family="text">
      <style:text-properties fo:font-weight="bold" officeooo:rsid="000dd66a" style:font-weight-asian="bold" style:font-weight-complex="bold"/>
    </style:style>
    <style:style style:name="T27" style:family="text">
      <style:text-properties fo:font-weight="bold" officeooo:rsid="0160cefc" style:font-weight-asian="bold" style:font-weight-complex="bold"/>
    </style:style>
    <style:style style:name="T28" style:family="text">
      <style:text-properties officeooo:rsid="01caa47b"/>
    </style:style>
    <style:style style:name="T29" style:family="text">
      <style:text-properties officeooo:rsid="01d74f08"/>
    </style:style>
    <style:style style:name="T30" style:family="text">
      <style:text-properties officeooo:rsid="01db7a8a"/>
    </style:style>
    <style:style style:name="T31" style:family="text">
      <style:text-properties officeooo:rsid="01f2a99b"/>
    </style:style>
    <style:style style:name="T32" style:family="text">
      <style:text-properties officeooo:rsid="01e9b30f"/>
    </style:style>
    <style:style style:name="T33" style:family="text">
      <style:text-properties officeooo:rsid="01f3430c"/>
    </style:style>
    <style:style style:name="T34"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f3430c"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50" style:family="text">
      <style:text-properties style:font-name="Liberation Sans" fo:font-style="normal" style:text-underline-style="none" officeooo:rsid="013c55a1" fo:background-color="transparent" loext:char-shading-value="0" style:font-style-asian="normal" style:font-style-complex="normal"/>
    </style:style>
    <style:style style:name="T51" style:family="text">
      <style:text-properties style:font-name="Liberation Sans" fo:font-style="normal" style:text-underline-style="none" officeooo:rsid="00083d4b" fo:background-color="transparent" loext:char-shading-value="0" style:font-style-asian="normal" style:font-style-complex="normal"/>
    </style:style>
    <style:style style:name="T52"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5</text:span><text:span text:style-name="T2">th</text:span><text:span text:style-name="T3"> </text:span><text:span text:style-name="T1">April</text:span><text:span text:style-name="T4"> 20</text:span><text:span text:style-name="T5">2</text:span><text:span text:style-name="T6">6</text:span></text:p>
      <text:p text:style-name="P3">Ephesians 4:8</text:p>
      <text:p text:style-name="P4"><text:s/>‘When he ascended on high, he took many captives and gave gifts to his people.’</text:p>
      <text:p text:style-name="P5"/>
      <text:p text:style-name="P6">Let us pray…</text:p>
      <text:p text:style-name="P6"/>
      <text:p text:style-name="P7">Thanks to God</text:p>
      <text:p text:style-name="P8"><text:span text:style-name="T7">O </text:span><text:span text:style-name="T8">L</text:span><text:span text:style-name="T9">o</text:span><text:span text:style-name="T8">r</text:span><text:span text:style-name="T9">d,</text:span><text:span text:style-name="T10"> </text:span><text:span text:style-name="T11">we </text:span><text:span text:style-name="T12">thank You that </text:span><text:span text:style-name="T13">today we gather to celebrate the victory that Jesus won out of the apparent defeat of Good Friday</text:span><text:span text:style-name="T14">. </text:span><text:span text:style-name="T13">We can know for certain that the tomb is empty, and Jesus is now the Risen King.</text:span></text:p>
      <text:p text:style-name="P9"/>
      <text:p text:style-name="P10"><text:span text:style-name="T15">We </text:span><text:span text:style-name="T13">thank You that between His death on the Cross and His walking out of the tomb, He took many captives from the enemy who had enslaved them in sin</text:span><text:span text:style-name="T14">. </text:span><text:span text:style-name="T13">And we thank You that we also have been freed from our captivity to sin so that we may live according to Your free gift of righteousness.</text:span></text:p>
      <text:p text:style-name="P11"/>
      <text:p text:style-name="P10"><text:span text:style-name="T14">We thank You </text:span><text:span text:style-name="T16">that </text:span><text:span text:style-name="T13">because Jesus rose, </text:span><text:span text:style-name="T16">we have been </text:span><text:span text:style-name="T15">forgiven </text:span><text:span text:style-name="T17">by Your grace and mercy alone</text:span><text:span text:style-name="T16">. </text:span><text:span text:style-name="T18">W</text:span><text:span text:style-name="T19">e thank You that </text:span><text:span text:style-name="T20">we will shortly take part in the Lord’s Supper, commemorating the Cross and </text:span><text:span text:style-name="T21">the </text:span><text:span text:style-name="T20">Resurrection</text:span><text:span text:style-name="T22">.</text:span></text:p>
      <text:p text:style-name="P12"/>
      <text:p text:style-name="P12"><text:span text:style-name="T23">We thank You for sending the Holy Spirit, Third Person of the Trinity, to be with us daily, to come alongside and enable us to resist temptation, to open our minds to Your Word, and to grant us wisdom as we live in </text:span><text:span text:style-name="T24">this</text:span><text:span text:style-name="T23"> fallen world.</text:span></text:p>
      <text:p text:style-name="P13"/>
      <text:p text:style-name="P14"><text:span text:style-name="T25">The Wide World...</text:span><text:span text:style-name="T26"> a</text:span><text:span text:style-name="T25">nd the </text:span><text:span text:style-name="T27">W</text:span><text:span text:style-name="T25">ider Church</text:span></text:p>
      <text:p text:style-name="P15"><text:span text:style-name="T28">W</text:span><text:span text:style-name="T29">e </text:span><text:span text:style-name="T30">pray</text:span><text:span text:style-name="T29"> for this </text:span><text:span text:style-name="T28">world </text:span><text:span text:style-name="T29">wh</text:span><text:span text:style-name="T31">ich continues blindly on its unrepentant way, ignoring the Rising of the Prince of Peace, Who is now Ascended and reigning from heaven</text:span><text:span text:style-name="T32">. </text:span><text:span text:style-name="T33">We pray for many eyes to be opened to Your general Providence, and to Your saving love, both at this season and every day.</text:span></text:p>
      <text:p text:style-name="P15"/>
      <text:p text:style-name="P16"><text:span text:style-name="T24">We </text:span><text:span text:style-name="T31">thank You</text:span><text:span text:style-name="T24"> for the many churches where Your Word is faithfully preached and lived, and ask that You would strengthen Your people to stand firm but with grace, against the lies so popular today.</text:span></text:p>
      <text:p text:style-name="P16"/>
      <text:p text:style-name="P17">We pray for th<text:span text:style-name="T24">os</text:span>e <text:span text:style-name="T24">close to us, who do not know the Truth. </text:span><text:span text:style-name="T33">Grant us wisdom to know when and how to share the Good News that Jesus lives.</text:span></text:p>
      <text:p text:style-name="P16"/>
      <text:p text:style-name="P18">Ashburton</text:p>
      <text:p text:style-name="P19"><text:span text:style-name="T34">W</text:span><text:span text:style-name="T35">e pray for our </text:span><text:span text:style-name="T36">work</text:span><text:span text:style-name="T37"> </text:span><text:span text:style-name="T34">here at Ashburton, </text:span><text:span text:style-name="T37">as we </text:span><text:span text:style-name="T38">also labour with our various talents and abilities in the work of the Kingdom.</text:span></text:p>
      <text:p text:style-name="P20"><text:span text:style-name="T38"/></text:p>
      <text:p text:style-name="P21"><text:span text:style-name="T39">We </text:span><text:span text:style-name="T40">know that in this fallen world, our outer man grows weaker every day, yet we </text:span><text:span text:style-name="T41">continue</text:span><text:span text:style-name="T42"> </text:span><text:span text:style-name="T36">in</text:span><text:span text:style-name="T39"> pray</text:span><text:span text:style-name="T36">er</text:span><text:span text:style-name="T39"> for</text:span><text:span text:style-name="T43"> </text:span><text:span text:style-name="T41">those in need of Your healing hand – for </text:span><text:span text:style-name="T43">Alan, </text:span><text:span text:style-name="T34">Diane, </text:span><text:span text:style-name="T40">Russell</text:span><text:span text:style-name="T38"> </text:span><text:span text:style-name="T34">and others affected by illness or injury. </text:span><text:span text:style-name="T40">We remember Levi, and ask that You continue to strengthen him in his development ay by day. We pray that You would continue to strengthen us so that we can witness to the truth of the Risen Lord, and the sure hope of eternal life in Him.</text:span></text:p>
      <text:p text:style-name="P22"/>
      <text:p text:style-name="P23"><text:span text:style-name="T44">We thank You for </text:span><text:span text:style-name="T36">Your Word, and for </text:span><text:span text:style-name="T40">Chris</text:span><text:span text:style-name="T45"> as</text:span><text:span text:style-name="T36"> he preach</text:span><text:span text:style-name="T45">es</text:span><text:span text:style-name="T36"> today. </text:span><text:span text:style-name="T45">We pray that we would be diligent </text:span><text:span text:style-name="T40">receivers</text:span><text:span text:style-name="T45"> of the means of grace, </text:span><text:span text:style-name="T40">both in Your Word and in the sacrament</text:span><text:span text:style-name="T45">.</text:span></text:p>
      <text:p text:style-name="P24"/>
      <text:p text:style-name="P25"><text:span text:style-name="T46">In </text:span><text:span text:style-name="T44">His</text:span><text:span text:style-name="T47"> </text:span><text:span text:style-name="T48">Precious Name </text:span><text:span text:style-name="T49">we pray</text:span><text:span text:style-name="T50">, </text:span><text:span text:style-name="T51">Amen.</text:span></text:p>
      <text:p text:style-name="P26"/>
      <text:p text:style-name="P27">As we will shortly take part in the Lord’s Supper, let is recall the fundamentals of our faith by reciting <text:span text:style-name="T24">The Apostle’s Creed:</text:span></text:p>
      <text:p text:style-name="P28"/>
      <text:p text:style-name="P29">I believe in God, the Father almighty,</text:p>
      <text:p text:style-name="P29"><text:s text:c="6"/>creator of heaven and earth.</text:p>
      <text:p text:style-name="P29"/>
      <text:p text:style-name="P29">I believe in Jesus Christ, his only Son, our Lord,</text:p>
      <text:p text:style-name="P29"><text:s text:c="6"/>who was conceived by the Holy Spirit</text:p>
      <text:p text:style-name="P29"><text:s text:c="6"/>and born of the virgin Mary.</text:p>
      <text:p text:style-name="P29"><text:s text:c="6"/>He suffered under Pontius Pilate,</text:p>
      <text:p text:style-name="P29"><text:s text:c="6"/>was crucified, died, and was buried;</text:p>
      <text:p text:style-name="P29"><text:s text:c="6"/>he descended to hell.</text:p>
      <text:p text:style-name="P29"><text:s text:c="6"/>The third day he rose again from the dead.</text:p>
      <text:p text:style-name="P29"><text:s text:c="6"/>He ascended to heaven</text:p>
      <text:p text:style-name="P29"><text:s text:c="6"/>and is seated at the right hand of God the Father almighty.</text:p>
      <text:p text:style-name="P29"><text:s text:c="6"/>From there he will come to judge the living and the dead.</text:p>
      <text:p text:style-name="P29"/>
      <text:p text:style-name="P29">I believe in the Holy Spirit,</text:p>
      <text:p text:style-name="P29"><text:s text:c="6"/>the holy catholic* church,</text:p>
      <text:p text:style-name="P29"><text:s text:c="6"/>the communion of saints,</text:p>
      <text:p text:style-name="P29"><text:s text:c="6"/>the forgiveness of sins,</text:p>
      <text:p text:style-name="P29"><text:s text:c="6"/>the resurrection of the body,</text:p>
      <text:p text:style-name="P29"><text:s text:c="6"/>and the life everlasting. Amen.</text:p>
      <text:p text:style-name="P28"/>
      <text:p text:style-name="P30">Our Father, Who is in heaven,<text:line-break/>hallowed be Your name;<text:line-break/>Your kingdom come;<text:line-break/>Your will be done,<text:line-break/>on earth as it is in heaven.</text:p>
      <text:p text:style-name="P31"/>
      <text:p text:style-name="P31">Give us this day our daily bread.<text:line-break/>And forgive us our trespasses,<text:line-break/>as we forgive those that trespass against us.<text:line-break/>Lead us not into temptation;<text:line-break/>but deliver us from evil.</text:p>
      <text:p text:style-name="P31"/>
      <text:p text:style-name="P31">For Yours is the kingdom,<text:line-break/>the power, and the glory,<text:line-break/>for ever and ever.<text:line-break/>Amen.</text:p>
      <text:p text:style-name="P31"/>
      <text:p text:style-name="P32">They shall not grow old, as we that are left grow old.</text:p>
      <text:p text:style-name="P33">Age shall not weary them, nor the years condemn.</text:p>
      <text:p text:style-name="P33">At the going <text:span text:style-name="T52">d</text:span>own of the sun, and in the morning, </text:p>
      <text:p text:style-name="P33">We WILL remember them.</text:p>
      <text:p text:style-name="P34">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4-04T19:52:07.031027438</dc:date>
    <meta:editing-duration>PT17H55M22S</meta:editing-duration>
    <meta:editing-cycles>204</meta:editing-cycles>
    <meta:generator>LibreOffice/25.8.5.2$Linux_X86_64 LibreOffice_project/580$Build-2</meta:generator>
    <meta:print-date>2025-09-06T23:29:48.038812840</meta:print-date>
    <meta:printed-by>PDF files</meta:printed-by>
    <meta:document-statistic meta:table-count="0" meta:image-count="0" meta:object-count="0" meta:page-count="4" meta:paragraph-count="46" meta:word-count="733" meta:character-count="3904" meta:non-whitespace-character-count="3124"/>
  </office:meta>
</office:document-meta>
</file>