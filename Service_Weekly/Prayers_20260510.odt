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paragraph-properties style:writing-mode="lr-tb"/>
      <style:text-properties fo:font-size="13pt" officeooo:paragraph-rsid="01db7a8a" style:font-size-asian="13pt" style:font-size-complex="13pt"/>
    </style:style>
    <style:style style:name="P10"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1" style:family="paragraph" style:parent-style-name="Preformatted_20_Text">
      <style:paragraph-properties style:writing-mode="lr-tb"/>
      <style:text-properties fo:font-size="13pt" officeooo:rsid="01e115a9" officeooo:paragraph-rsid="01ee2e52" style:font-size-asian="13pt" style:font-size-complex="13pt"/>
    </style:style>
    <style:style style:name="P12" style:family="paragraph" style:parent-style-name="Preformatted_20_Text">
      <style:paragraph-properties style:writing-mode="lr-tb"/>
      <style:text-properties style:font-name="Liberation Sans" fo:font-size="13pt" fo:font-style="normal" style:text-underline-style="none" officeooo:rsid="01ee2e52" officeooo:paragraph-rsid="01ee2e52" style:font-name-asian="Nimbus Mono L" style:font-size-asian="13pt" style:font-style-asian="normal" style:font-name-complex="Liberation Mono"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4" style:family="paragraph" style:parent-style-name="Preformatted_20_Text">
      <style:paragraph-properties style:writing-mode="lr-tb"/>
      <style:text-properties style:font-name="Liberation Sans" fo:font-size="13pt" fo:font-style="normal" style:text-underline-style="none" officeooo:rsid="01ee2e52" officeooo:paragraph-rsid="01f3fc26" style:font-size-asian="13pt" style:font-style-asian="normal" style:font-size-complex="13pt" style:font-style-complex="normal"/>
    </style:style>
    <style:style style:name="P15" style:family="paragraph" style:parent-style-name="Preformatted_20_Text">
      <style:paragraph-properties style:writing-mode="lr-tb"/>
      <style:text-properties style:font-name="Liberation Sans" fo:font-size="13pt" fo:font-style="normal" style:text-underline-style="none" officeooo:rsid="01f596aa" officeooo:paragraph-rsid="01f596aa" style:font-size-asian="13pt" style:font-style-asian="normal" style:font-size-complex="13pt" style:font-style-complex="normal"/>
    </style:style>
    <style:style style:name="P16"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erif" fo:font-size="13pt" fo:font-style="normal" style:text-underline-style="none" officeooo:rsid="00083d4b" officeooo:paragraph-rsid="00083d4b" style:font-size-asian="13pt" style:font-style-asian="normal" style:font-size-complex="13pt" style:font-style-complex="normal"/>
    </style:style>
    <style:style style:name="P19" style:family="paragraph" style:parent-style-name="Preformatted_20_Text">
      <style:paragraph-properties style:writing-mode="lr-tb"/>
      <style:text-properties fo:font-size="13pt" officeooo:paragraph-rsid="01efb23b" style:font-size-asian="13pt" style:font-size-complex="13pt"/>
    </style:style>
    <style:style style:name="P20" style:family="paragraph" style:parent-style-name="Preformatted_20_Text">
      <style:paragraph-properties style:writing-mode="lr-tb"/>
      <style:text-properties style:font-name="Liberation Sans" fo:font-size="13pt" fo:font-style="normal" style:text-underline-style="none" officeooo:rsid="01e9b30f" officeooo:paragraph-rsid="01ef3a07" fo:background-color="transparent" style:font-name-asian="Nimbus Mono L" style:font-size-asian="13pt" style:font-style-asian="normal" style:font-name-complex="Liberation Mono" style:font-size-complex="13pt" style:font-style-complex="normal"/>
    </style:style>
    <style:style style:name="P21" style:family="paragraph" style:parent-style-name="Preformatted_20_Text">
      <style:paragraph-properties style:writing-mode="lr-tb"/>
      <style:text-properties fo:font-size="13pt" officeooo:paragraph-rsid="01ef3a07" style:font-size-asian="13pt" style:font-size-complex="13pt"/>
    </style:style>
    <style:style style:name="P22" style:family="paragraph" style:parent-style-name="Preformatted_20_Text">
      <style:text-properties style:font-name="Liberation Sans" fo:font-size="13pt" fo:font-style="normal" style:text-underline-style="none" officeooo:rsid="01d92df6" officeooo:paragraph-rsid="01dd3a06" fo:background-color="transparent" style:font-name-asian="Nimbus Mono L" style:font-size-asian="13pt" style:font-style-asian="normal" style:font-name-complex="Liberation Mono" style:font-size-complex="13pt" style:font-style-complex="normal"/>
    </style:style>
    <style:style style:name="P23" style:family="paragraph" style:parent-style-name="Preformatted_20_Text">
      <style:paragraph-properties style:writing-mode="lr-tb"/>
      <style:text-properties fo:font-size="13pt" officeooo:paragraph-rsid="01dd3a06" style:font-size-asian="13pt" style:font-size-complex="13pt"/>
    </style:style>
    <style:style style:name="P24"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5" style:family="paragraph" style:parent-style-name="Preformatted_20_Text">
      <style:text-properties fo:font-size="13pt" officeooo:paragraph-rsid="01c26751" style:font-size-asian="13pt" style:font-size-complex="13pt"/>
    </style:style>
    <style:style style:name="T1" style:family="text">
      <style:text-properties style:font-name="Liberation Sans" fo:font-size="16pt" fo:font-weight="bold" officeooo:rsid="01f32036"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f32036" style:font-size-asian="16pt" style:font-weight-asian="bold" style:font-size-complex="16pt" style:font-weight-complex="bold"/>
    </style:style>
    <style:style style:name="T7" style:family="text">
      <style:text-properties officeooo:rsid="01f3fc26"/>
    </style:style>
    <style:style style:name="T8"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f3fc26"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7" style:family="text">
      <style:text-properties style:font-name="Liberation Sans" fo:font-style="normal" style:text-underline-style="none"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20" style:family="text">
      <style:text-properties fo:font-weight="bold" style:font-weight-asian="bold" style:font-weight-complex="bold"/>
    </style:style>
    <style:style style:name="T21" style:family="text">
      <style:text-properties fo:font-weight="bold" officeooo:rsid="000dd66a" style:font-weight-asian="bold" style:font-weight-complex="bold"/>
    </style:style>
    <style:style style:name="T22" style:family="text">
      <style:text-properties fo:font-weight="bold" officeooo:rsid="0160cefc" style:font-weight-asian="bold" style:font-weight-complex="bold"/>
    </style:style>
    <style:style style:name="T23" style:family="text">
      <style:text-properties officeooo:rsid="01caa47b"/>
    </style:style>
    <style:style style:name="T24" style:family="text">
      <style:text-properties officeooo:rsid="01d74f08"/>
    </style:style>
    <style:style style:name="T25" style:family="text">
      <style:text-properties officeooo:rsid="01db7a8a"/>
    </style:style>
    <style:style style:name="T26" style:family="text">
      <style:text-properties officeooo:rsid="01ef3a07"/>
    </style:style>
    <style:style style:name="T27" style:family="text">
      <style:text-properties officeooo:rsid="01f6c144"/>
    </style:style>
    <style:style style:name="T28"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f6c144"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36" style:family="text">
      <style:text-properties officeooo:rsid="01f802ae"/>
    </style:style>
    <style:style style:name="T37" style:family="text">
      <style:text-properties officeooo:rsid="01f81dde"/>
    </style:style>
    <style:style style:name="T38"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3c55a1" fo:background-color="transparent" loext:char-shading-value="0" style:font-style-asian="normal" style:font-style-complex="normal"/>
    </style:style>
    <style:style style:name="T44"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10</text:span><text:span text:style-name="T2">th</text:span><text:span text:style-name="T3"> </text:span><text:span text:style-name="T1">May</text:span><text:span text:style-name="T4"> 20</text:span><text:span text:style-name="T5">2</text:span><text:span text:style-name="T6">6</text:span></text:p>
      <text:p text:style-name="P3">Psalm <text:span text:style-name="T7">62:1-2</text:span></text:p>
      <text:p text:style-name="P4"><text:span text:style-name="T7">[1] </text:span>Truly my soul finds rest in God; my salvation comes from <text:span text:style-name="T7">H</text:span>im.</text:p>
      <text:p text:style-name="P5"><text:span text:style-name="T7">[2] </text:span>Truly <text:span text:style-name="T7">H</text:span>e is my rock and my salvation; <text:span text:style-name="T7">H</text:span>e is my fortress, I shall never be shaken.</text:p>
      <text:p text:style-name="P6"/>
      <text:p text:style-name="P7">Let us pray…</text:p>
      <text:p text:style-name="P7"/>
      <text:p text:style-name="P8">Thanks to God</text:p>
      <text:p text:style-name="P9"><text:span text:style-name="T8">O </text:span><text:span text:style-name="T9">L</text:span><text:span text:style-name="T10">o</text:span><text:span text:style-name="T9">r</text:span><text:span text:style-name="T10">d,</text:span><text:span text:style-name="T11"> </text:span><text:span text:style-name="T12">we </text:span><text:span text:style-name="T13">thank You that </text:span><text:span text:style-name="T14">truly </text:span><text:span text:style-name="T15">You </text:span><text:span text:style-name="T14">are our Saviour, our only hope</text:span><text:span text:style-name="T16">.</text:span></text:p>
      <text:p text:style-name="P10"/>
      <text:p text:style-name="P11"><text:span text:style-name="T17">We </text:span><text:span text:style-name="T14">live in a world You made by speaking Your word “let there be...” and this creation declares Your mighty power, showing us just how small we are. Only You can control our destiny.</text:span></text:p>
      <text:p text:style-name="P12"/>
      <text:p text:style-name="P11"><text:span text:style-name="T16">We thank You </text:span><text:span text:style-name="T18">that </text:span><text:span text:style-name="T14">You are our rock and our salvation, our fortress of safety. We thank You that despite the fact that man turned away from You in rebellion, trying to run his life apart from Your Perfect Goodness, </text:span><text:span text:style-name="T18">we have been </text:span><text:span text:style-name="T17">forgiven </text:span><text:span text:style-name="T19">by Your grace and mercy alone</text:span><text:span text:style-name="T18">.</text:span></text:p>
      <text:p text:style-name="P13"/>
      <text:p text:style-name="P14">We thank You for sending <text:span text:style-name="T7">Jesus to take our place, to suffer the righteous punishment we deserved, to free us from the guilt we knew, and to give us new life, so that we could live upright, instead of bending always towards sin and selfishness.</text:span></text:p>
      <text:p text:style-name="P14"/>
      <text:p text:style-name="P15">We thank You Holy Spirit, for being beside us daily, to steer us away from temptation’s folly, and to sanctify us so that we progress towards our heavenly destiny with faith and perseverance.</text:p>
      <text:p text:style-name="P13"/>
      <text:p text:style-name="P16"><text:span text:style-name="T20">The Wide World...</text:span><text:span text:style-name="T21"> a</text:span><text:span text:style-name="T20">nd the </text:span><text:span text:style-name="T22">W</text:span><text:span text:style-name="T20">ider Church</text:span></text:p>
      <text:p text:style-name="P17"><text:span text:style-name="T23">W</text:span><text:span text:style-name="T24">e </text:span><text:span text:style-name="T25">pray</text:span><text:span text:style-name="T24"> for this </text:span><text:span text:style-name="T23">world </text:span><text:span text:style-name="T24">where </text:span><text:span text:style-name="T25">so m</text:span><text:span text:style-name="T26">any live </text:span><text:span text:style-name="T27">without a sure foundation, without knowing You, and therefore without a hope or a future. We pray for our own sensitivity to the plight of these lost wanderers, so that Your church would work in Your strength to tell as many as will listen of the sacrifice of Jesus for them, and of the assurance of salvation that they too can know, as we know.</text:span></text:p>
      <text:p text:style-name="P17"/>
      <text:p text:style-name="P18"><text:span text:style-name="T20">Ashburton</text:span></text:p>
      <text:p text:style-name="P19"><text:span text:style-name="T28">W</text:span><text:span text:style-name="T29">e </text:span><text:span text:style-name="T30">continue to </text:span><text:span text:style-name="T29">pray for our </text:span><text:span text:style-name="T31">work</text:span><text:span text:style-name="T32"> </text:span><text:span text:style-name="T28">here at Ashburton, </text:span><text:span text:style-name="T32">as we </text:span><text:span text:style-name="T33">also labour with our various talents and abilities in th</text:span><text:span text:style-name="T30">is same</text:span><text:span text:style-name="T33"> work of the Kingdom.</text:span></text:p>
      <text:p text:style-name="P20"/>
      <text:p text:style-name="P21"><text:span text:style-name="T33">W</text:span><text:span text:style-name="T34">e pray for the Selection Committee </text:span><text:span text:style-name="T33">which work</text:span><text:span text:style-name="T30">s</text:span><text:span text:style-name="T33"> to do Your will</text:span><text:span text:style-name="T34">, so that </text:span><text:span text:style-name="T33">Your purposes prevail. We pray for ourselves to </text:span><text:span text:style-name="T35">support them as they serve on our behalf, </text:span><text:span text:style-name="T30">and in the meantime we pray that we are not idle but energetic as faithful servants, doing the Master’s work day by day</text:span><text:span text:style-name="T33">.</text:span></text:p>
      <text:p text:style-name="P20"><text:line-break/><text:span text:style-name="T36">We pray for our fellowship to deepen, as we care for one another, build each other up </text:span><text:span text:style-name="T37">i</text:span><text:span text:style-name="T36">n our most holy faith, and especially at this time as we support Jan, coming to grips with her new circumsta</text:span><text:span text:style-name="T37">n</text:span><text:span text:style-name="T36">ces without Allan.</text:span></text:p>
      <text:p text:style-name="P22"/>
      <text:p text:style-name="P23"><text:span text:style-name="T38">We thank You for </text:span><text:span text:style-name="T31">Your Word, and for </text:span><text:span text:style-name="T30">Jake </text:span><text:span text:style-name="T35">as</text:span><text:span text:style-name="T31"> he preach</text:span><text:span text:style-name="T35">es</text:span><text:span text:style-name="T31"> today. </text:span><text:span text:style-name="T35">We pray that we would be </text:span><text:span text:style-name="T30">take due warning, </text:span><text:span text:style-name="T35">making the most of the means of grace.</text:span></text:p>
      <text:p text:style-name="P24"/>
      <text:p text:style-name="P25"><text:span text:style-name="T39">In </text:span><text:span text:style-name="T38">His</text:span><text:span text:style-name="T40"> </text:span><text:span text:style-name="T41">Precious Name </text:span><text:span text:style-name="T42">we pray</text:span><text:span text:style-name="T43">, </text:span><text:span text:style-name="T44">Am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5-09T22:20:43.989378423</dc:date>
    <meta:editing-duration>PT18H14M19S</meta:editing-duration>
    <meta:editing-cycles>208</meta:editing-cycles>
    <meta:generator>LibreOffice/26.2.2.2$Linux_X86_64 LibreOffice_project/620$Build-2</meta:generator>
    <meta:print-date>2025-09-06T23:29:48.038812840</meta:print-date>
    <meta:printed-by>PDF files</meta:printed-by>
    <meta:document-statistic meta:table-count="0" meta:image-count="0" meta:object-count="0" meta:page-count="1" meta:paragraph-count="20" meta:word-count="464" meta:character-count="2437" meta:non-whitespace-character-count="1992"/>
  </office:meta>
</office:document-meta>
</file>