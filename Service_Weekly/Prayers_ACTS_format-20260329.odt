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6pt" fo:font-weight="bold" officeooo:rsid="00681d32" officeooo:paragraph-rsid="00681d32" style:font-size-asian="16pt" style:font-weight-asian="bold" style:font-size-complex="16pt" style:font-weight-complex="bold"/>
    </style:style>
    <style:style style:name="P3" style:family="paragraph" style:parent-style-name="Preformatted_20_Text">
      <style:paragraph-properties fo:text-align="center" style:justify-single-word="false"/>
      <style:text-properties officeooo:paragraph-rsid="00083d4b"/>
    </style:style>
    <style:style style:name="P4" style:family="paragraph" style:parent-style-name="Preformatted_20_Text">
      <style:text-properties officeooo:paragraph-rsid="005cfd1e"/>
    </style:style>
    <style:style style:name="P5" style:family="paragraph" style:parent-style-name="Preformatted_20_Text">
      <style:text-properties style:font-name="Liberation Sans" fo:font-size="12pt" fo:font-style="normal" style:text-underline-style="none" officeooo:rsid="00083d4b" officeooo:paragraph-rsid="006a57e1"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erif"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7" style:family="paragraph" style:parent-style-name="Preformatted_20_Text">
      <style:text-properties style:font-name="Liberation Sans"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8" style:family="paragraph" style:parent-style-name="Preformatted_20_Text">
      <style:text-properties style:font-name="Liberation Serif" fo:font-size="12pt" fo:font-style="normal" style:text-underline-style="none" fo:font-weight="bold" officeooo:rsid="00699b60" officeooo:paragraph-rsid="00699b60"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ans" fo:font-size="12pt" fo:font-style="normal" style:text-underline-style="none" fo:font-weight="normal" officeooo:rsid="006a57e1" officeooo:paragraph-rsid="006a57e1" style:font-size-asian="12pt" style:font-style-asian="normal" style:font-weight-asian="normal" style:font-size-complex="12pt" style:font-style-complex="normal" style:font-weight-complex="normal"/>
    </style:style>
    <style:style style:name="P10" style:family="paragraph" style:parent-style-name="Preformatted_20_Text">
      <style:text-properties style:font-name="Liberation Sans" officeooo:paragraph-rsid="006a57e1"/>
    </style:style>
    <style:style style:name="P11" style:family="paragraph" style:parent-style-name="Preformatted_20_Text">
      <style:text-properties officeooo:paragraph-rsid="00699b60"/>
    </style:style>
    <style:style style:name="P12" style:family="paragraph" style:parent-style-name="Preformatted_20_Text">
      <style:text-properties officeooo:paragraph-rsid="0062fdb6"/>
    </style:style>
    <style:style style:name="P13"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14"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16" style:family="paragraph" style:parent-style-name="Preformatted_20_Text">
      <style:text-properties officeooo:paragraph-rsid="0063c17d"/>
    </style:style>
    <style:style style:name="P17" style:family="paragraph" style:parent-style-name="Preformatted_20_Text">
      <style:text-properties style:font-name="Liberation Sans" fo:font-size="12pt" fo:font-style="normal" style:text-underline-style="none" officeooo:rsid="0063c17d" officeooo:paragraph-rsid="0063c17d" style:font-name-asian="Nimbus Mono L" style:font-size-asian="12pt" style:font-style-asian="normal" style:font-name-complex="Liberation Mono" style:font-size-complex="12pt" style:font-style-complex="normal"/>
    </style:style>
    <style:style style:name="P18"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9" style:family="paragraph" style:parent-style-name="Preformatted_20_Text">
      <style:text-properties officeooo:paragraph-rsid="006058f6"/>
    </style:style>
    <style:style style:name="P20" style:family="paragraph" style:parent-style-name="Preformatted_20_Text">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21" style:family="paragraph" style:parent-style-name="Preformatted_20_Text">
      <style:text-properties style:font-name="Liberation Serif" fo:font-size="12pt" fo:font-style="normal" style:text-underline-style="none" officeooo:rsid="00083d4b" officeooo:paragraph-rsid="00083d4b" style:font-size-asian="12pt" style:font-style-asian="normal" style:font-size-complex="12pt" style:font-style-complex="normal"/>
    </style:style>
    <style:style style:name="P22" style:family="paragraph" style:parent-style-name="Preformatted_20_Text">
      <style:text-properties officeooo:paragraph-rsid="00708dcb"/>
    </style:style>
    <style:style style:name="P23" style:family="paragraph" style:parent-style-name="Preformatted_20_Text">
      <style:text-properties style:font-name="Liberation Sans" fo:font-size="12pt" fo:font-style="normal" style:text-underline-style="none" officeooo:rsid="0031096c" officeooo:paragraph-rsid="006e9b56" style:font-name-asian="Nimbus Mono L" style:font-size-asian="12pt" style:font-style-asian="normal" style:font-name-complex="Liberation Mono" style:font-size-complex="12pt" style:font-style-complex="normal"/>
    </style:style>
    <style:style style:name="P24" style:family="paragraph" style:parent-style-name="Preformatted_20_Text">
      <style:text-properties officeooo:paragraph-rsid="00618e95"/>
    </style:style>
    <style:style style:name="T1" style:family="text">
      <style:text-properties style:font-name="Liberation Sans" fo:font-size="16pt" fo:font-weight="bold" officeooo:rsid="0073d27e" style:font-size-asian="16pt" style:font-weight-asian="bold" style:font-size-complex="16pt" style:font-weight-complex="bold"/>
    </style:style>
    <style:style style:name="T2" style:family="text">
      <style:text-properties style:font-name="Liberation Sans" fo:font-size="16pt" fo:font-weight="bold" officeooo:rsid="002f1f25" style:font-size-asian="16pt" style:font-weight-asian="bold" style:font-size-complex="16pt" style:font-weight-complex="bold"/>
    </style:style>
    <style:style style:name="T3" style:family="text">
      <style:text-properties style:font-name="Liberation Sans" fo:font-size="16pt" fo:font-weight="bold" officeooo:rsid="001b99ac" style:font-size-asian="16pt" style:font-weight-asian="bold" style:font-size-complex="16pt" style:font-weight-complex="bold"/>
    </style:style>
    <style:style style:name="T4" style:family="text">
      <style:text-properties style:font-name="Liberation Sans" fo:font-size="16pt" fo:font-weight="bold" officeooo:rsid="0073d27e"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fo:font-variant="normal" fo:text-transform="none" fo:color="#202020" loext:opacity="100%" fo:font-family="apple-system, BlinkMacSystemFont, 'Segoe UI', Roboto, Helvetica, Arial, sans-serif, 'Apple Color Emoji', 'Segoe UI Emoji', 'Segoe UI Symbol'" fo:font-size="10.5pt" fo:letter-spacing="normal" fo:font-style="normal" style:text-underline-style="none" fo:font-weight="bold" officeooo:rsid="00699b60"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fo:font-variant="normal" fo:text-transform="none" fo:color="#000000" loext:opacity="100%" fo:font-family="system-ui, apple-system, 'Segoe UI', Roboto, Ubuntu, Cantarell, 'Noto Sans', sans-serif, Arial"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8" style:family="text">
      <style:text-properties fo:font-variant="normal" fo:text-transform="none" fo:color="#000000" loext:opacity="100%" fo:font-family="Carlito" style:font-family-generic="swiss" style:font-pitch="variable" fo:font-size="10.5pt" fo:letter-spacing="normal" fo:font-style="italic" style:text-underline-style="none" fo:font-weight="normal" officeooo:rsid="0045ab15" style:font-name-asian="Nimbus Mono L" style:font-size-asian="10.5pt" style:font-style-asian="italic" style:font-weight-asian="bold" style:font-name-complex="Liberation Mono" style:font-size-complex="10.5pt" style:font-style-complex="italic" style:font-weight-complex="bold"/>
    </style:style>
    <style:style style:name="T9" style:family="text">
      <style:text-properties style:font-name="Liberation Sans" officeooo:rsid="00751fa5"/>
    </style:style>
    <style:style style:name="T10" style:family="text">
      <style:text-properties style:font-name="Liberation Sans"/>
    </style:style>
    <style:style style:name="T11" style:family="text">
      <style:text-properties style:font-name="Liberation Sans" officeooo:rsid="007584fe"/>
    </style:style>
    <style:style style:name="T12" style:family="text">
      <style:text-properties officeooo:rsid="007584fe"/>
    </style:style>
    <style:style style:name="T13" style:family="text">
      <style:text-properties fo:font-size="12pt" fo:font-style="normal" style:text-underline-style="none" fo:font-weight="normal" officeooo:rsid="006a57e1"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751fa5"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7584fe"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6a57e1" style:font-name-asian="Nimbus Mono L" style:font-size-asian="12pt" style:font-style-asian="normal" style:font-weight-asian="normal" style:font-name-complex="Liberation Mono" style:font-size-complex="12pt" style:font-style-complex="normal" style:font-weight-complex="normal"/>
    </style:style>
    <style:style style:name="T17" style:family="text">
      <style:text-properties style:font-name="Liberation Serif"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18" style:family="text">
      <style:text-properties style:font-name="Liberation Serif" fo:font-size="12pt" fo:font-style="normal" style:text-underline-style="none" fo:font-weight="bold" officeooo:rsid="006a57e1" style:font-name-asian="Nimbus Mono L" style:font-size-asian="12pt" style:font-style-asian="normal" style:font-weight-asian="bold" style:font-name-complex="Liberation Mono" style:font-size-complex="12pt" style:font-style-complex="normal" style:font-weight-complex="bold"/>
    </style:style>
    <style:style style:name="T19" style:family="text">
      <style:text-properties style:font-name="Liberation Sans" fo:font-size="12pt" fo:font-style="normal" style:text-underline-style="none" officeooo:rsid="0076729d" style:font-size-asian="12pt" style:font-style-asian="normal" style:font-size-complex="12pt" style:font-style-complex="normal"/>
    </style:style>
    <style:style style:name="T20"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21"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22"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23" style:family="text">
      <style:text-properties style:font-name="Liberation Sans" fo:font-size="12pt" fo:font-style="normal" style:text-underline-style="none" officeooo:rsid="006bb186"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7584fe"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30" style:family="text">
      <style:text-properties officeooo:rsid="006bb186"/>
    </style:style>
    <style:style style:name="T31" style:family="text">
      <style:text-properties style:font-name="Liberation Sans" fo:font-size="12pt" fo:font-style="normal" style:text-underline-style="none" officeooo:rsid="006bd248"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75d97d" style:font-name-asian="Nimbus Mono L" style:font-size-asian="12pt" style:font-style-asian="normal" style:font-name-complex="Liberation Mono" style:font-size-complex="12pt" style:font-style-complex="normal"/>
    </style:style>
    <style:style style:name="T34" style:family="text">
      <style:text-properties officeooo:rsid="000dd66a"/>
    </style:style>
    <style:style style:name="T35"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36"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37" style:family="text">
      <style:text-properties style:font-name="Liberation Sans" fo:font-size="12pt" fo:font-style="normal" style:text-underline-style="none" officeooo:rsid="006de440" style:font-size-asian="12pt" style:font-style-asian="normal" style:font-size-complex="12pt" style:font-style-complex="normal"/>
    </style:style>
    <style:style style:name="T38" style:family="text">
      <style:text-properties style:font-name="Liberation Sans" fo:font-size="12pt" fo:font-style="normal" style:text-underline-style="none" officeooo:rsid="0075d97d" style:font-size-asian="12pt" style:font-style-asian="normal" style:font-size-complex="12pt" style:font-style-complex="normal"/>
    </style:style>
    <style:style style:name="T39" style:family="text">
      <style:text-properties style:font-name="Liberation Sans" fo:font-size="12pt" fo:font-style="normal" style:text-underline-style="none" officeooo:rsid="006de44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76729d" style:font-name-asian="Nimbus Mono L" style:font-size-asian="12pt" style:font-style-asian="normal" style:font-name-complex="Liberation Mono" style:font-size-complex="12pt" style:font-style-complex="normal"/>
    </style:style>
    <style:style style:name="T41" style:family="text">
      <style:text-properties fo:font-weight="bold" officeooo:rsid="006bb186" style:font-weight-asian="bold" style:font-weight-complex="bold"/>
    </style:style>
    <style:style style:name="T42" style:family="text">
      <style:text-properties fo:font-weight="bold" style:font-weight-asian="bold" style:font-weight-complex="bold"/>
    </style:style>
    <style:style style:name="T43"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44"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45"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48"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49"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50" style:family="text">
      <style:text-properties style:font-name="Liberation Sans" fo:font-size="12pt" fo:font-style="normal" style:text-underline-style="none" officeooo:rsid="006e9b56" style:font-name-asian="Nimbus Mono L" style:font-size-asian="12pt" style:font-style-asian="normal" style:font-name-complex="Liberation Mono" style:font-size-complex="12pt" style:font-style-complex="normal"/>
    </style:style>
    <style:style style:name="T51" style:family="text">
      <style:text-properties style:font-name="Liberation Sans" fo:font-size="12pt" fo:font-style="normal" style:text-underline-style="none" officeooo:rsid="00708dcb" style:font-name-asian="Nimbus Mono L" style:font-size-asian="12pt" style:font-style-asian="normal" style:font-name-complex="Liberation Mono" style:font-size-complex="12pt" style:font-style-complex="normal"/>
    </style:style>
    <style:style style:name="T52" style:family="text">
      <style:text-properties style:font-name="Liberation Sans" fo:font-size="12pt" fo:font-style="normal" style:text-underline-style="none" officeooo:rsid="0076b411" style:font-name-asian="Nimbus Mono L" style:font-size-asian="12pt" style:font-style-asian="normal" style:font-name-complex="Liberation Mono" style:font-size-complex="12pt"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including Prayer of Confession</text:p>
      <text:p text:style-name="P3"><text:span text:style-name="T1">29</text:span><text:span text:style-name="T2">th</text:span><text:span text:style-name="T3"> </text:span><text:span text:style-name="T4">March</text:span><text:span text:style-name="T3"> 20</text:span><text:span text:style-name="T5">2</text:span><text:span text:style-name="T1">6</text:span></text:p>
      <text:p text:style-name="P4"><text:span text:style-name="T6">Psalm 4:5-8</text:span><text:span text:style-name="T7"> </text:span><text:span text:style-name="T8">[5] Offer right sacrifices, and put your trust in the Lord. [6] There are many who say, “Who will show us some good? Lift up the light of your face upon us, O Lord!” [7] You have put more joy in my heart than they have when their grain and wine abound. [8] In peace I will both lie down and sleep; for you alone, O Lord, make me dwell in safety.</text:span></text:p>
      <text:p text:style-name="P5"/>
      <text:p text:style-name="P6"><text:span text:style-name="T9">As we approach the commemoration of the death and resurrection of our Lord and Saviour, w</text:span><text:span text:style-name="T10">e come to a time of prayer, to acknowledge God’s greatness, His perfection, to confess our imperfection </text:span><text:span text:style-name="T11">and need of Jesus’ sacrifice</text:span><text:span text:style-name="T10">, and to bring our requests to Him Who alone is able to effect lasting change, according to His purposes for the world and for us within it.</text:span></text:p>
      <text:p text:style-name="P7"/>
      <text:p text:style-name="P8">Adoration</text:p>
      <text:p text:style-name="P9">God Almighty, Father, Son and Holy Spirit, Creator of all that is, we Your creatures come before You only because You are merciful, faithful and righteous. From everlasting to everlasting, You alone are God, all-powerful, all-seeing, all-holy and altogether just! If we were to rely on Your justice, we would be lost, for we <text:span text:style-name="T12">could never offer right sacrifices</text:span>, <text:span text:style-name="T12">because we are </text:span>warped by sin into self-centredness, <text:span text:style-name="T12">and</text:span> we would not seek You o<text:span text:style-name="T12">r put our trust in You</text:span>.</text:p>
      <text:p text:style-name="P9"/>
      <text:p text:style-name="P8">Confession</text:p>
      <text:p text:style-name="P10"><text:span text:style-name="T13">But because You are all-loving, and graciously merciful, we are not destroyed. We look back upon our week and </text:span><text:span text:style-name="T14">confess</text:span><text:span text:style-name="T13"> the times when we have failed, when we have not been holy as You are holy, when we have s</text:span><text:span text:style-name="T15">ham</text:span><text:span text:style-name="T13">ed the Name of Jesus, when we have put down another person, thinking more of ourselves, when we have </text:span><text:span text:style-name="T16">given in to </text:span><text:span text:style-name="T13">temptation. We are ashamed of our thoughts, words and deeds and freely confess them to You now.</text:span></text:p>
      <text:p text:style-name="P9"/>
      <text:p text:style-name="P11"><text:span text:style-name="T17">Thanks</text:span><text:span text:style-name="T18">giving</text:span></text:p>
      <text:p text:style-name="P12"><text:span text:style-name="T19">Now</text:span><text:span text:style-name="T20"> </text:span><text:span text:style-name="T21">we thank </text:span><text:span text:style-name="T20">You </text:span><text:span text:style-name="T21">that </text:span><text:span text:style-name="T22">You </text:span><text:span text:style-name="T23">have not abandoned us, but rescued us.</text:span><text:span text:style-name="T24"> We thank You </text:span><text:span text:style-name="T25">for the special grace of salvation: while we were still sinners, Jesus came as the Sinless, Son of Man to take our place and suffer the penalty which we deserved, dying in our stead so we could go free</text:span><text:span text:style-name="T26">.</text:span></text:p>
      <text:p text:style-name="P13"/>
      <text:p text:style-name="P4"><text:span text:style-name="T27">W</text:span><text:span text:style-name="T24">e thank You that You </text:span><text:span text:style-name="T28">have lifted up the light of Your face upon us</text:span><text:span text:style-name="T29">. </text:span><text:span text:style-name="T28">We thank You that we now have joy in our hearts, and peace in our relationship with You</text:span><text:span text:style-name="T29">.</text:span></text:p>
      <text:p text:style-name="P14"/>
      <text:p text:style-name="P15"><text:span text:style-name="T30">Supplication: </text:span>The Wider World</text:p>
      <text:p text:style-name="P16"><text:span text:style-name="T31">In the wider world, w</text:span><text:span text:style-name="T32">e continue to pray for the nation</text:span><text:span text:style-name="T28">s at war</text:span><text:span text:style-name="T32"> and </text:span><text:span text:style-name="T28">for </text:span><text:span text:style-name="T32">the people </text:span><text:span text:style-name="T28">caught by the conflicts which have been started by others</text:span><text:span text:style-name="T32">. We pray </text:span><text:span text:style-name="T28">for believers in those places, and for Your people </text:span><text:span text:style-name="T33">in </text:span><text:span text:style-name="T28">church</text:span><text:span text:style-name="T33">es nearby,</text:span><text:span text:style-name="T28"> who seek to provide for the refugees escap</text:span><text:span text:style-name="T33">ing from</text:span><text:span text:style-name="T28"> the war zones.</text:span></text:p>
      <text:p text:style-name="P17"/>
      <text:p text:style-name="P18">...<text:span text:style-name="T34"> a</text:span>nd the wider Church</text:p>
      <text:p text:style-name="P19"><text:span text:style-name="T35">W</text:span><text:span text:style-name="T36">e </text:span><text:span text:style-name="T37">pray also for Your people in churches </text:span><text:span text:style-name="T38">around the world as they support missionaries to those conflict zones</text:span><text:span text:style-name="T39">. </text:span><text:span text:style-name="T33">We thank You for Lazlo and Eva Mihalyi and the work they have been doing in Hungary and Rumania. As they return home, we pray for their safe travel and their transition to Australian life. We </text:span><text:span text:style-name="T40">pray</text:span><text:span text:style-name="T33"> You would provide new workers to take their place so that Your witness may continue.</text:span></text:p>
      <text:p text:style-name="P20"/>
      <text:p text:style-name="P21"><text:span text:style-name="T41">Supplication: </text:span><text:span text:style-name="T42">Ashburton</text:span></text:p>
      <text:p text:style-name="P22"><text:span text:style-name="T20">Here in Ashburton we </text:span><text:span text:style-name="T43">pray for </text:span><text:span text:style-name="T19">David Hann</text:span><text:span text:style-name="T44"> as he preach</text:span><text:span text:style-name="T45">es Your Word, </text:span><text:span text:style-name="T46">and w</text:span><text:span text:style-name="T45">e pray for our own understanding as we listen. May </text:span><text:span text:style-name="T47">we be transformed by the renewing of our minds so </text:span><text:span text:style-name="T46">tha</text:span><text:span text:style-name="T45">t </text:span><text:span text:style-name="T47">Your </text:span><text:span text:style-name="T46">living Word</text:span><text:span text:style-name="T45"> go</text:span><text:span text:style-name="T47">es</text:span><text:span text:style-name="T45"> deep into our hearts. </text:span><text:span text:style-name="T47">Holy Spirit, we pray that You would</text:span><text:span text:style-name="T45"> change us </text:span><text:span text:style-name="T48">so that</text:span><text:span text:style-name="T49"> we live our lives more and more in conformity to Your Word. We pray that our fellowship </text:span><text:span text:style-name="T48">continues to</text:span><text:span text:style-name="T49"> grow stronger </text:span><text:span text:style-name="T48">each</text:span><text:span text:style-name="T47"> week</text:span><text:span text:style-name="T49">, </text:span><text:span text:style-name="T48">both in Sunday worship and in our community groups.</text:span></text:p>
      <text:p text:style-name="P23"/>
      <text:p text:style-name="P24"><text:span text:style-name="T50">Finally, w</text:span><text:span text:style-name="T47">e pray for </text:span><text:span text:style-name="T49">ourselves in the service of the Kingdom. </text:span><text:span text:style-name="T50">We thank You that we are a part of the work of spreading the Good News, </text:span><text:span text:style-name="T51">and members of the world</text:span><text:span text:style-name="T52">wide</text:span><text:span text:style-name="T51"> Body of Christ.</text:span><text:span text:style-name="T48"> May we grow to show the character of our Risen Lord so well that others will see Him rather than u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3-28T20:12:00.581671934</dc:date>
    <meta:editing-duration>PT4H34M38S</meta:editing-duration>
    <meta:editing-cycles>58</meta:editing-cycles>
    <meta:generator>LibreOffice/25.8.5.2$Linux_X86_64 LibreOffice_project/580$Build-2</meta:generator>
    <meta:document-statistic meta:table-count="0" meta:image-count="0" meta:object-count="0" meta:page-count="1" meta:paragraph-count="19" meta:word-count="677" meta:character-count="3634" meta:non-whitespace-character-count="2976"/>
  </office:meta>
</office:document-meta>
</file>