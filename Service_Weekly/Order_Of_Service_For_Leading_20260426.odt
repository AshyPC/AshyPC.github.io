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199cm" style:contextual-spacing="false" fo:line-height="150%"/>
    </style:style>
    <style:style style:name="P4" style:family="paragraph" style:parent-style-name="Text_20_body" style:list-style-name="L1">
      <style:paragraph-properties fo:margin-top="0cm" fo:margin-bottom="0.199cm" style:contextual-spacing="false" fo:line-height="150%"/>
    </style:style>
    <style:style style:name="P5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6" style:family="paragraph" style:parent-style-name="Text_20_body" style:list-style-name="L2">
      <style:paragraph-properties fo:margin-top="0cm" fo:margin-bottom="0.4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2 Thessalonians 2:13-15 / <text:span text:style-name="Strong_20_Emphasis">Opening prayer</text:span> (DM)</text:p>
      <text:p text:style-name="P2"><text:span text:style-name="Strong_20_Emphasis">Praise</text:span>: <text:span text:style-name="Emphasis">The Tender Love a Father Has (Rej! 68)</text:span></text:p>
      <text:p text:style-name="P2"><text:span text:style-name="Strong_20_Emphasis">Bible Reading</text:span>: Acts 18:1-23 (MarJo)</text:p>
      <text:p text:style-name="P3"><text:span text:style-name="Strong_20_Emphasis">Announcements</text:span> (DM &amp; JA)</text:p>
      <text:list text:style-name="L1">
        <text:list-item>
          <text:p text:style-name="P4">Selection Committee &amp; Assessor Elders (DM)</text:p>
        </text:list-item>
        <text:list-item>
          <text:p text:style-name="P4">Evening Prayer Service 5pm Today</text:p>
        </text:list-item>
        <text:list-item>
          <text:p text:style-name="P5">Memorial Service Sat 2nd May 10:30am</text:p>
        </text:list-item>
      </text:list>
      <text:p text:style-name="P2"><text:span text:style-name="Strong_20_Emphasis">Praise</text:span>: <text:span text:style-name="Emphasis">Lord from Deep Sorrows I Call</text:span></text:p>
      <text:p text:style-name="P2"><text:span text:style-name="Strong_20_Emphasis">Prayer for the church and the world</text:span>  (JA)</text:p>
      <text:p text:style-name="P2"><text:span text:style-name="Strong_20_Emphasis">Bible reading</text:span>: 1 Thessalonians 1:1-10 (Stephen)</text:p>
      <text:p text:style-name="P2"><text:span text:style-name="Strong_20_Emphasis">Praise</text:span>: <text:span text:style-name="Emphasis">Prepare Our Hearts O God (Show Us Christ)</text:span> (offering)</text:p>
      <text:p text:style-name="P2"><text:span text:style-name="Strong_20_Emphasis">Sermon</text:span>: HOW A CHURCH IS BORN AND SUSTAINED (DM)</text:p>
      <text:p text:style-name="P2"><text:span text:style-name="Strong_20_Emphasis">Praise</text:span>: <text:span text:style-name="Emphasis">How Vast the Benefits Divine</text:span> <text:span text:style-name="Emphasis">(Rej! 95)</text:span></text:p>
      <text:p text:style-name="P2"><text:span text:style-name="Strong_20_Emphasis">Benediction</text:span> (DM)</text:p>
      <text:p text:style-name="P2"/>
      <text:p text:style-name="P2"><text:span text:style-name="Strong_20_Emphasis">Sermon Outline</text:span></text:p>
      <text:p text:style-name="P2">"How a Church is Born and Sustained” (1 Thessalonians 1:4-5)</text:p>
      <text:p text:style-name="P2">Introduction</text:p>
      <text:list text:style-name="L2">
        <text:list-item>
          <text:p text:style-name="P6">God makes his electing love known (v4)</text:p>
        </text:list-item>
        <text:list-item>
          <text:p text:style-name="P6">God causes his Word to be proclaimed in a certain way (v5a)</text:p>
        </text:list-item>
        <text:list-item>
          <text:p text:style-name="P6">God uses a certain kind of Preacher (v5b)</text:p>
        </text:list-item>
      </text:list>
      <text:p text:style-name="P2">Conclusion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41a4f"/>
    </style:style>
    <style:style style:name="MT3" style:family="text">
      <style:text-properties officeooo:rsid="00495328"/>
    </style:style>
    <style:style style:name="MT4" style:family="text">
      <style:text-properties officeooo:rsid="004c95cc"/>
    </style:style>
    <style:style style:name="MT5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6</text:span><text:span text:style-name="MT3">th</text:span> <text:span text:style-name="MT4">April</text:span><text:span text:style-name="MT5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4-25T20:27:19.032240497</dc:date>
    <meta:editing-duration>PT6H41M48S</meta:editing-duration>
    <meta:editing-cycles>49</meta:editing-cycles>
    <meta:generator>LibreOffice/26.2.2.2$Linux_X86_64 LibreOffice_project/620$Build-2</meta:generator>
    <meta:print-date>2024-02-03T21:06:33.278074986</meta:print-date>
    <meta:document-statistic meta:table-count="0" meta:image-count="0" meta:object-count="0" meta:page-count="1" meta:paragraph-count="22" meta:word-count="148" meta:character-count="844" meta:non-whitespace-character-count="723"/>
  </office:meta>
</office:document-meta>
</file>