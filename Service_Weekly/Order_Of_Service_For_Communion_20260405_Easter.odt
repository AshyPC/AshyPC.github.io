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56041e"/>
    </style:style>
    <style:style style:name="P2" style:family="paragraph" style:parent-style-name="Text_20_body" style:list-style-name="L1">
      <style:paragraph-properties fo:margin-top="0cm" fo:margin-bottom="0.499cm" style:contextual-spacing="false" fo:line-height="150%"/>
      <style:text-properties officeooo:rsid="0056041e" officeooo:paragraph-rsid="0056041e"/>
    </style:style>
    <style:style style:name="P3" style:family="paragraph" style:parent-style-name="Text_20_body">
      <style:paragraph-properties fo:margin-top="0cm" fo:margin-bottom="0.499cm" style:contextual-spacing="false" fo:line-height="150%"/>
    </style:style>
    <style:style style:name="P4" style:family="paragraph" style:parent-style-name="Text_20_body">
      <style:paragraph-properties fo:margin-top="0cm" fo:margin-bottom="0.499cm" style:contextual-spacing="false" fo:line-height="150%"/>
      <style:text-properties officeooo:paragraph-rsid="0057dabf"/>
    </style:style>
    <style:style style:name="P5" style:family="paragraph" style:parent-style-name="Text_20_body" style:list-style-name="L2"/>
    <style:style style:name="T1" style:family="text">
      <style:text-properties officeooo:rsid="0056041e"/>
    </style:style>
    <style:style style:name="T2" style:family="text">
      <style:text-properties officeooo:rsid="0057dabf"/>
    </style:style>
    <style:style style:name="T3" style:family="text">
      <style:text-properties fo:font-style="normal" officeooo:rsid="0056041e" style:font-style-asian="normal" style:font-style-complex="normal"/>
    </style:style>
    <style:style style:name="T4" style:family="text">
      <style:text-properties fo:text-transform="upperca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Announcements</text:span> (<text:span text:style-name="T1">John A</text:span>)</text:p>
      <text:list text:style-name="L1">
        <text:list-item>
          <text:p text:style-name="P2">He is Risen!</text:p>
        </text:list-item>
        <text:list-item>
          <text:p text:style-name="P2">Welcome to Chris Siriweera</text:p>
        </text:list-item>
      </text:list>
      <text:p text:style-name="P1"><text:span text:style-name="Strong_20_Emphasis">Call to Worship</text:span> (<text:span text:style-name="T1">Psalm 16</text:span>) / <text:span text:style-name="Strong_20_Emphasis">Opening prayer</text:span> (<text:span text:style-name="T1">Chris S</text:span>)</text:p>
      <text:p text:style-name="P3"><text:span text:style-name="Strong_20_Emphasis">Praise</text:span>: <text:span text:style-name="Emphasis">Christ The Lord Is Risen Today</text:span></text:p>
      <text:p text:style-name="P3"><text:span text:style-name="Strong_20_Emphasis">Bible Reading</text:span>: John 20:1-18 (<text:span text:style-name="T2">Tim A</text:span>)</text:p>
      <text:p text:style-name="P3"><text:span text:style-name="Strong_20_Emphasis">Praise</text:span>: <text:span text:style-name="Emphasis">In Christ Alone </text:span><text:span text:style-name="Emphasis"><text:span text:style-name="T3">(Offering)</text:span></text:span></text:p>
      <text:p text:style-name="P3"><text:span text:style-name="Strong_20_Emphasis">Prayer for the church and the world</text:span> (<text:span text:style-name="T1">John A</text:span>)</text:p>
      <text:p text:style-name="P3"><text:span text:style-name="Strong_20_Emphasis">Bible reading</text:span>: John 20:19-29 (<text:span text:style-name="T2">Rachel D</text:span>)</text:p>
      <text:p text:style-name="P4"><text:span text:style-name="Strong_20_Emphasis">Sermon</text:span>: “<text:span text:style-name="T4">From Doubt To Belief!</text:span>” (<text:span text:style-name="T2">CS)</text:span></text:p>
      <text:p text:style-name="P3"><text:span text:style-name="Strong_20_Emphasis">Praise</text:span>: <text:span text:style-name="Emphasis">Christ Our Hope In Life and Death</text:span></text:p>
      <text:p text:style-name="P3"><text:span text:style-name="Strong_20_Emphasis">The Lord’s Supper </text:span><text:span text:style-name="Strong_20_Emphasis"><text:span text:style-name="T1">(CS)</text:span></text:span></text:p>
      <text:p text:style-name="P3"><text:span text:style-name="Strong_20_Emphasis">Praise</text:span>: <text:span text:style-name="Emphasis">Thine Be The Glory</text:span></text:p>
      <text:p text:style-name="P3"><text:span text:style-name="Strong_20_Emphasis">Benediction</text:span> (<text:span text:style-name="T1">CS</text:span>)</text:p>
      <text:p text:style-name="Text_20_body"><text:span text:style-name="Strong_20_Emphasis">Sermon Outline</text:span></text:p>
      <text:p text:style-name="Text_20_body">“<text:span text:style-name="T4">From Doubt To Belief!</text:span>”  (John 20:24-29)</text:p>
      <text:p text:style-name="Text_20_body">Introduction</text:p>
      <text:list text:style-name="L2">
        <text:list-item>
          <text:p text:style-name="P5">The Report by the disciples -24-25a</text:p>
        </text:list-item>
        <text:list-item>
          <text:p text:style-name="P5">The Refusal to believe - 25b</text:p>
        </text:list-item>
        <text:list-item>
          <text:p text:style-name="P5">The Revealing Moment -26-29</text:p>
        </text:list-item>
      </text:list>
      <text:p text:style-name="Text_20_body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6041e"/>
    </style:style>
    <style:style style:name="MT2" style:family="text">
      <style:text-properties officeooo:rsid="004b0446"/>
    </style:style>
    <style:style style:name="MT3" style:family="text">
      <style:text-properties officeooo:rsid="0054c282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5th</text:span> <text:span text:style-name="MT1">March</text:span><text:span text:style-name="MT2"> 202</text:span><text:span text:style-name="MT3">6 </text:span><text:span text:style-name="MT1">Easter Day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4-04T18:08:11.963195725</dc:date>
    <meta:editing-duration>PT6H52M40S</meta:editing-duration>
    <meta:editing-cycles>51</meta:editing-cycles>
    <meta:generator>LibreOffice/25.8.5.2$Linux_X86_64 LibreOffice_project/580$Build-2</meta:generator>
    <meta:print-date>2026-04-04T18:02:52.267477429</meta:print-date>
    <meta:printed-by>PDF files</meta:printed-by>
    <meta:document-statistic meta:table-count="0" meta:image-count="0" meta:object-count="0" meta:page-count="1" meta:paragraph-count="22" meta:word-count="117" meta:character-count="660" meta:non-whitespace-character-count="569"/>
  </office:meta>
</office:document-meta>
</file>